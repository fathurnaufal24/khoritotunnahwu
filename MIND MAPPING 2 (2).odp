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1EA8085CB25.jpg" manifest:media-type="image/jpeg"/>
  <manifest:file-entry manifest:full-path="Pictures/10000000000002E00000019EFC1FD9D1.jpg" manifest:media-type="image/jpeg"/>
  <manifest:file-entry manifest:full-path="Pictures/MediaPreview2.png" manifest:media-type=""/>
  <manifest:file-entry manifest:full-path="Pictures/10000000000002E00000019EF4441F90.jpg" manifest:media-type="image/jpeg"/>
  <manifest:file-entry manifest:full-path="Pictures/10000000000002DF0000019ADE8A7756.jpg" manifest:media-type="image/jpeg"/>
  <manifest:file-entry manifest:full-path="Pictures/10000000000002E00000019E299B2CC7.jpg" manifest:media-type="image/jpeg"/>
  <manifest:file-entry manifest:full-path="Pictures/10000000000002DF0000019C3D3D1E0D.jpg" manifest:media-type="image/jpeg"/>
  <manifest:file-entry manifest:full-path="Pictures/MediaPreview1.png" manifest:media-type=""/>
  <manifest:file-entry manifest:full-path="Configurations2/" manifest:media-type="application/vnd.sun.xml.ui.configuration"/>
  <manifest:file-entry manifest:full-path="ppt/media/media2.m4a" manifest:media-type="audio/mp4"/>
  <manifest:file-entry manifest:full-path="ppt/media/media1.m4a" manifest:media-type="audio/mp4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aditional Arabic" svg:font-family="'Traditional Arabic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4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63%" loext:shadow-blur="0.159cm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gradient" draw:fill-gradient-name="Gradient_20_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gradient" draw:fill-gradient-name="Gradient_20_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gradient" draw:fill-gradient-name="Gradient_20_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gradient" draw:fill-gradient-name="Gradient_20_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gradient" draw:fill-gradient-name="Gradient_20_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20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21" style:family="graphic" style:parent-style-name="standard">
      <style:graphic-properties draw:stroke="none" svg:stroke-width="0cm" draw:fill="gradient" draw:fill-gradient-name="Gradient_20_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2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" style:family="graphic" style:parent-style-name="standard">
      <style:graphic-properties draw:stroke="solid" svg:stroke-width="0.018cm" svg:stroke-color="#70ad47" draw:stroke-linejoin="miter" svg:stroke-linecap="butt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53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>
      <style:graphic-properties draw:stroke="solid" svg:stroke-width="0.053cm" svg:stroke-color="#ed7d3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2" loext:color-type="theme"/>
      </style:graphic-properties>
    </style:style>
    <style:style style:name="gr61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2" loext:color-type="theme"/>
      </style:graphic-properties>
    </style:style>
    <style:style style:name="gr62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svg:stroke-width="0cm" draw:fill="solid" draw:fill-color="#5b9bd5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accent5" loext:color-type="theme"/>
      </style:graphic-properties>
    </style:style>
    <style:style style:name="gr65" style:family="graphic" style:parent-style-name="standard">
      <style:graphic-properties draw:stroke="none" svg:stroke-width="0cm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>
      <style:graphic-properties draw:stroke="solid" svg:stroke-width="0.018cm" svg:stroke-color="#5b9bd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5" loext:color-type="theme"/>
      </style:graphic-properties>
    </style:style>
    <style:style style:name="gr71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5" loext:color-type="theme"/>
      </style:graphic-properties>
    </style:style>
    <style:style style:name="gr72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none" svg:stroke-width="0cm" draw:fill="gradient" draw:fill-gradient-name="Gradient_20_3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63%" loext:shadow-blur="0.159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5" style:family="graphic" style:parent-style-name="standard">
      <style:graphic-properties draw:stroke="solid" svg:stroke-width="0.035cm" svg:stroke-color="#bc8e00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4" loext:color-type="theme"/>
        <loext:fill-complex-color loext:theme-type="accent4" loext:color-type="theme"/>
      </style:graphic-properties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>
      <style:graphic-properties draw:stroke="solid" svg:stroke-width="0.053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4" loext:color-type="theme"/>
      </style:graphic-properties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>
      <style:graphic-properties draw:stroke="solid" svg:stroke-width="0.053cm" svg:stroke-color="#ffc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4" loext:color-type="theme"/>
      </style:graphic-properties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4" style:family="graphic" style:parent-style-name="standard">
      <style:graphic-properties loext:decorative="false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>
      <style:graphic-properties draw:stroke="solid" svg:stroke-width="0.053cm" svg:stroke-color="#5b9bd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5" loext:color-type="theme"/>
      </style:graphic-properties>
    </style:style>
    <style:style style:name="gr1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5" loext:color-type="theme"/>
      </style:graphic-properties>
    </style:style>
    <style:style style:name="gr1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6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0" style:family="graphic" style:parent-style-name="standard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7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7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2" style:family="graphic" style:parent-style-name="objectwithoutfill">
      <style:graphic-properties draw:fill="none" draw:textarea-vertical-align="middle" loext:decorative="false"/>
    </style:style>
    <style:style style:name="gr18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8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9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0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0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0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1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1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3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3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4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5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5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6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7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89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7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299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00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2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3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4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5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6" style:family="graphic" style:parent-style-name="standard" style:list-style-name="L2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8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0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P2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gradient" draw:fill-gradient-name="Gradient_20_6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P17" style:family="paragraph">
      <loext:graphic-properties draw:fill="gradient" draw:fill-gradient-name="Gradient_20_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P18" style:family="paragraph">
      <style:paragraph-properties fo:margin-left="1.27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1.27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raditional Arabic" style:font-size-complex="28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P2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raditional Arabic" style:font-size-complex="28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P25" style:family="paragraph">
      <loext:graphic-properties draw:fill="gradient" draw:fill-gradient-name="Gradient_20_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40pt" fo:letter-spacing="normal" fo:font-style="normal" style:text-underline-style="none" fo:font-weight="bold" fo:background-color="transparent" style:font-size-asian="40pt" style:font-style-asian="normal" style:font-weight-asian="bold" style:font-name-complex="Traditional Arabic" style:font-size-complex="40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P26" style:family="paragraph">
      <loext:graphic-properties draw:fill="solid" draw:fill-color="#5b9bd5"/>
      <style:paragraph-properties fo:text-align="left"/>
      <style:text-properties fo:font-size="18pt"/>
    </style:style>
    <style:style style:name="P27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40pt" fo:letter-spacing="normal" fo:font-style="normal" style:text-underline-style="none" fo:font-weight="bold" fo:background-color="transparent" style:font-size-asian="40pt" style:font-style-asian="normal" style:font-weight-asian="bold" style:font-name-complex="Traditional Arabic" style:font-size-complex="40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P28" style:family="paragraph">
      <loext:graphic-properties draw:fill="gradient" draw:fill-gradient-name="Gradient_20_3"/>
      <style:paragraph-properties fo:text-align="left"/>
      <style:text-properties fo:font-size="18pt"/>
    </style:style>
    <style:style style:name="P29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raditional Arabic" style:font-size-complex="20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P30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P31" style:family="paragraph">
      <loext:graphic-properties draw:fill="none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2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4472c4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gerian" fo:font-size="18pt" fo:letter-spacing="normal" fo:language="en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48pt" fo:letter-spacing="normal" fo:font-style="normal" style:text-underline-style="none" fo:font-weight="normal" fo:background-color="transparent" style:font-size-asian="48pt" style:font-style-asian="normal" style:font-weight-asian="normal" style:font-name-complex="Traditional Arabic" style:font-size-complex="4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Traditional Arabic" style:font-size-complex="32pt" style:language-complex="ar" style:country-complex="EG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bold" fo:background-color="transparent" style:font-size-asian="32pt" style:font-style-asian="normal" style:font-weight-asian="bold" style:font-name-complex="Traditional Arabic" style:font-size-complex="32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32pt" fo:letter-spacing="normal" fo:language="en" fo:country="ID" fo:font-style="normal" style:text-underline-style="none" fo:font-weight="normal" fo:background-color="transparent" style:font-size-asian="32pt" style:font-style-asian="normal" style:font-weight-asian="normal" style:font-name-complex="Traditional Arabic" style:font-size-complex="32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bold" fo:background-color="transparent" style:font-size-asian="32pt" style:font-style-asian="normal" style:font-weight-asian="bold" style:font-name-complex="Traditional Arabic" style:font-size-complex="32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Traditional Arabic" style:font-size-complex="2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36pt" fo:letter-spacing="normal" fo:font-style="normal" style:text-underline-style="none" fo:font-weight="normal" fo:background-color="transparent" style:font-size-asian="36pt" style:font-style-asian="normal" style:font-weight-asian="normal" style:font-name-complex="Traditional Arabic" style:font-size-complex="36pt" style:language-complex="ar" style:country-complex="EG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raditional Arabic" style:font-size-complex="18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raditional Arabic" style:font-size-complex="28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Traditional Arabic" style:font-size-complex="28pt" style:language-complex="ar" style:country-complex="SA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36pt" fo:letter-spacing="normal" fo:font-style="normal" style:text-underline-style="none" fo:font-weight="bold" fo:background-color="transparent" style:font-size-asian="36pt" style:font-style-asian="normal" style:font-weight-asian="bold" style:font-name-complex="Traditional Arabic" style:font-size-complex="36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44pt" fo:letter-spacing="normal" fo:font-style="normal" style:text-underline-style="none" fo:font-weight="bold" fo:background-color="transparent" style:font-size-asian="44pt" style:font-style-asian="normal" style:font-weight-asian="bold" style:font-name-complex="Traditional Arabic" style:font-size-complex="44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raditional Arabic" fo:font-size="36pt" fo:letter-spacing="normal" fo:font-style="normal" style:text-underline-style="none" fo:font-weight="bold" fo:background-color="transparent" style:font-size-asian="36pt" style:font-style-asian="normal" style:font-weight-asian="bold" style:font-name-complex="Traditional Arabic" style:font-size-complex="36pt" style:language-complex="ar" style:country-complex="SA" style:font-style-complex="normal" style:font-weight-complex="bold"/>
    </style:style>
    <style:style style:name="T22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Traditional Arabic" fo:font-size="36pt" fo:letter-spacing="normal" fo:font-style="normal" style:text-underline-style="none" fo:font-weight="bold" fo:background-color="transparent" style:font-size-asian="36pt" style:font-style-asian="normal" style:font-weight-asian="bold" style:font-name-complex="Traditional Arabic" style:font-size-complex="36pt" style:language-complex="ar" style:country-complex="SA" style:font-style-complex="normal" style:font-weight-complex="bold"/>
    </style:style>
    <style:style style:name="T23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Traditional Arabic" fo:font-size="36pt" fo:letter-spacing="normal" fo:font-style="normal" style:text-underline-style="none" fo:font-weight="bold" fo:background-color="transparent" style:font-size-asian="36pt" style:font-style-asian="normal" style:font-weight-asian="bold" style:font-name-complex="Traditional Arabic" style:font-size-complex="36pt" style:language-complex="ar" style:country-complex="SA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raditional Arabic" style:font-size-complex="28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bold" fo:background-color="transparent" style:font-size-asian="32pt" style:font-style-asian="normal" style:font-weight-asian="bold" style:font-name-complex="Traditional Arabic" style:font-size-complex="32pt" style:language-complex="ar" style:country-complex="SA" style:font-style-complex="normal" style:font-weight-complex="bold"/>
    </style:style>
    <style:style style:name="T26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bold" fo:background-color="transparent" style:font-size-asian="32pt" style:font-style-asian="normal" style:font-weight-asian="bold" style:font-name-complex="Traditional Arabic" style:font-size-complex="32pt" style:language-complex="ar" style:country-complex="SA" style:font-style-complex="normal" style:font-weight-complex="bold"/>
    </style:style>
    <style:style style:name="T27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bold" fo:background-color="transparent" style:font-size-asian="32pt" style:font-style-asian="normal" style:font-weight-asian="bold" style:font-name-complex="Traditional Arabic" style:font-size-complex="32pt" style:language-complex="ar" style:country-complex="SA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40pt" fo:letter-spacing="normal" fo:font-style="normal" style:text-underline-style="none" fo:font-weight="bold" fo:background-color="transparent" style:font-size-asian="40pt" style:font-style-asian="normal" style:font-weight-asian="bold" style:font-name-complex="Traditional Arabic" style:font-size-complex="40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40pt" fo:letter-spacing="normal" fo:font-style="normal" style:text-underline-style="none" fo:font-weight="bold" fo:background-color="transparent" style:font-size-asian="40pt" style:font-style-asian="normal" style:font-weight-asian="bold" style:font-name-complex="Traditional Arabic" style:font-size-complex="40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>
        <loext:char-complex-color loext:theme-type="accent4" loext:color-type="theme"/>
      </style:text-properties>
    </style:style>
    <style:style style:name="T32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/>
    </style:style>
    <style:style style:name="T34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/>
    </style:style>
    <style:style style:name="T35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/>
    </style:style>
    <style:style style:name="T37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/>
    </style:style>
    <style:style style:name="T39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raditional Arabic" style:font-size-complex="2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Algerian" fo:font-size="18pt" fo:letter-spacing="normal" fo:language="id" fo:country="ID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Algerian" fo:font-size="18pt" fo:letter-spacing="normal" fo:language="id" fo:country="ID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Algerian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32pt" fo:letter-spacing="normal" fo:font-style="normal" style:text-underline-style="none" fo:font-weight="bold" fo:background-color="transparent" style:font-size-asian="32pt" style:font-style-asian="normal" style:font-weight-asian="bold" style:font-name-complex="Traditional Arabic" style:font-size-complex="32pt" style:language-complex="ar" style:country-complex="EG" style:font-style-complex="normal" style:font-weight-complex="bold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raditional Arabic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40pt" fo:letter-spacing="normal" fo:font-style="normal" style:text-underline-style="none" fo:font-weight="normal" fo:background-color="transparent" style:font-size-asian="40pt" style:font-style-asian="normal" style:font-weight-asian="normal" style:font-name-complex="Traditional Arabic" style:font-size-complex="40pt" style:language-complex="ar" style:country-complex="EG" style:font-style-complex="normal" style:font-weight-complex="normal">
        <loext:char-complex-color loext:theme-type="light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raditional Arabic" style:font-size-complex="18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36pt" fo:letter-spacing="normal" fo:font-style="normal" style:text-underline-style="none" fo:font-weight="normal" fo:background-color="transparent" style:font-size-asian="36pt" style:font-style-asian="normal" style:font-weight-asian="normal" style:font-name-complex="Traditional Arabic" style:font-size-complex="36pt" style:language-complex="ar" style:country-complex="EG" style:font-style-complex="normal" style:font-weight-complex="normal">
        <loext:char-complex-color loext:theme-type="light1" loext:color-type="theme"/>
      </style:text-properties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18pt" fo:letter-spacing="normal" fo:language="en" fo:country="ID" fo:font-style="normal" style:text-underline-style="none" fo:font-weight="bold" fo:background-color="transparent" style:font-size-asian="18pt" style:font-style-asian="normal" style:font-weight-asian="bold" style:font-name-complex="Traditional Arabic" style:font-size-complex="18pt" style:language-complex="ar" style:country-complex="EG" style:font-style-complex="normal" style:font-weight-complex="bold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none" fo:font-weight="bold" fo:background-color="transparent" style:font-size-asian="18pt" style:font-style-asian="normal" style:font-weight-asian="bold" style:font-size-complex="18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raditional Arabic" style:font-size-complex="18pt" style:language-complex="ar" style:country-complex="EG" style:font-style-complex="normal" style:font-weight-complex="bold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name-complex="Traditional Arabic" style:font-size-complex="18pt" style:language-complex="ar" style:country-complex="EG" style:font-style-complex="normal" style:font-weight-complex="bold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language-complex="ar" style:country-complex="SA" style:font-style-complex="normal" style:font-weight-complex="bold">
        <loext:char-complex-color loext:theme-type="light1" loext:color-type="theme"/>
      </style:text-properties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2" style:font-size-asian="18pt" style:font-style-asian="normal" style:font-weight-asian="normal" style:font-name-complex="Arial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name-asian="Calibri2" style:font-size-asian="18pt" style:font-style-asian="normal" style:font-weight-asian="bold" style:font-name-complex="Arial" style:font-size-complex="18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Arial" style:font-size-complex="18pt" style:language-complex="ar" style:country-complex="SA" style:font-style-complex="normal" style:font-weight-complex="normal">
        <loext:char-complex-color loext:theme-type="light1" loext:color-type="theme"/>
      </style:text-properties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Arial" style:font-size-complex="18pt" style:language-complex="ar" style:country-complex="SA" style:font-style-complex="normal" style:font-weight-complex="bold">
        <loext:char-complex-color loext:theme-type="dark1" loext:color-type="theme"/>
      </style:text-properties>
    </style:style>
    <style:style style:name="T6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Traditional Arabic" style:font-size-complex="28pt" style:language-complex="ar" style:country-complex="EG" style:font-style-complex="normal" style:font-weight-complex="normal">
        <loext:char-complex-color loext:theme-type="light1" loext:color-type="theme"/>
      </style:text-properties>
    </style:style>
    <style:style style:name="T6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itional Arabic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raditional Arabic" style:font-size-complex="24pt" style:language-complex="ar" style:country-complex="EG" style:font-style-complex="normal" style:font-weight-complex="normal">
        <loext:char-complex-color loext:theme-type="light1" loext:color-type="theme"/>
      </style:text-properties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itional Arabic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raditional Arabic" style:font-size-complex="20pt" style:language-complex="ar" style:country-complex="EG" style:font-style-complex="normal" style:font-weight-complex="bold">
        <loext:char-complex-color loext:theme-type="dark1" loext:color-type="theme"/>
      </style:text-properties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100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b05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c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6cm" text:min-label-width="0.6cm"/>
        <style:text-properties style:font-name="Arial" fo:color="#ffff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6cm" text:min-label-width="0.6cm"/>
        <style:text-properties style:font-name="Aria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4" draw:style-name="gr1" draw:text-style-name="P1" draw:layer="layout" svg:width="32.743cm" svg:height="17.712cm" svg:x="0.561cm" svg:y="0.954cm">
          <draw:image xlink:href="Pictures/10000000000002DF0000019ADE8A7756.jpg" xlink:type="simple" xlink:show="embed" xlink:actuate="onLoad" draw:mime-type="image/jpeg">
            <text:p/>
          </draw:image>
        </draw:frame>
        <draw:custom-shape draw:name="Rectangle 1" draw:style-name="gr2" draw:text-style-name="P2" draw:layer="layout" svg:width="8.953cm" svg:height="3.61cm" svg:x="1.976cm" svg:y="9.031cm">
          <office:event-listeners>
            <presentation:event-listener script:event-name="dom:click" presentation:action="show" xlink:href="#page40" xlink:type="simple" xlink:show="embed" xlink:actuate="onRequest"/>
          </office:event-listeners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8.953cm" svg:height="3.61cm" svg:x="12.213cm" svg:y="13.687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4" draw:layer="layout" svg:width="8.953cm" svg:height="3.61cm" svg:x="23.527cm" svg:y="8.518cm">
          <office:event-listeners>
            <presentation:event-listener script:event-name="dom:click" presentation:action="show" xlink:href="#page39" xlink:type="simple" xlink:show="embed" xlink:actuate="onRequest"/>
          </office:event-listeners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5" draw:layer="layout" svg:width="8.953cm" svg:height="3.61cm" svg:x="12.213cm" svg:y="5.249cm">
          <office:event-listeners>
            <presentation:event-listener script:event-name="dom:click" presentation:action="show" xlink:href="#page41" xlink:type="simple" xlink:show="embed" xlink:actuate="onRequest"/>
          </office:event-listeners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7" draw:layer="layout" svg:width="10.442cm" svg:height="1.025cm" svg:x="10.884cm" svg:y="1.98cm">
          <text:p text:style-name="P6"><text:span text:style-name="T1">MENGENAL TANDA- TANDA I’ROB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7" draw:layer="layout" svg:width="3.006cm" svg:height="1.025cm" svg:x="26.221cm" svg:y="9.811cm">
          <text:p text:style-name="P6"><text:span text:style-name="T2">EVALUAS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7" draw:layer="layout" svg:width="2.51cm" svg:height="1.025cm" svg:x="15.042cm" svg:y="14.974cm">
          <text:p text:style-name="P6"><text:span text:style-name="T2">MATER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7" draw:layer="layout" svg:width="2.605cm" svg:height="1.025cm" svg:x="15.31cm" svg:y="6.273cm">
          <text:p text:style-name="P6"><text:span text:style-name="T2">TUJU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" draw:text-style-name="P7" draw:layer="layout" svg:width="3.237cm" svg:height="1.025cm" svg:x="4.639cm" svg:y="10.324cm">
          <text:p text:style-name="P6"><text:span text:style-name="T2">PETUNJU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0">
        <draw:frame draw:name="Picture 4" draw:style-name="gr1" draw:text-style-name="P1" draw:layer="layout" svg:width="31.627cm" svg:height="17.79cm" svg:x="0.875cm" svg:y="0.838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TextBox 5" draw:style-name="gr12" draw:text-style-name="P10" draw:layer="layout" svg:width="10.93cm" svg:height="2.307cm" svg:x="11.141cm" svg:y="1.626cm">
          <text:p text:style-name="P9"><text:span text:style-name="T3">مادة الدرس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" draw:style-name="gr13" draw:text-style-name="P11" draw:layer="layout" svg:width="8.787cm" svg:height="2.996cm" svg:x="22.073cm" svg:y="4.623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9"><text:span text:style-name="T4">تعريف الكل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3" draw:style-name="gr14" draw:text-style-name="P12" draw:layer="layout" svg:width="8.787cm" svg:height="2.996cm" svg:x="22.073cm" svg:y="9.39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9"><text:span text:style-name="T4">تقسيم الإعراب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15" draw:text-style-name="P12" draw:layer="layout" svg:width="8.787cm" svg:height="2.996cm" svg:x="3.319cm" svg:y="4.623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9"><text:span text:style-name="T4">تعريف الإعراب وأن اعه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16" draw:text-style-name="P13" draw:layer="layout" svg:width="8.474cm" svg:height="3.767cm" svg:x="3.319cm" svg:y="9.012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9"><text:span text:style-name="T4">إعراب الإسم المفرد و ج</text:span><text:span text:style-name="T5">جمع التكسير</text:span></text:p>
          <text:p text:style-name="P9"><text:span text:style-name="T6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0" draw:style-name="gr17" draw:text-style-name="P14" draw:layer="layout" svg:width="8.787cm" svg:height="2.996cm" svg:x="3.319cm" svg:y="14.427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9"><text:span text:style-name="T4">إعراب الأسماء الخمسة، الثنى، وجمع المذكر السا ل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2" draw:style-name="gr18" draw:text-style-name="P13" draw:layer="layout" svg:width="8.787cm" svg:height="2.996cm" svg:x="22.073cm" svg:y="14.427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9"><text:span text:style-name="T4">إعراب جمج المؤنث السالم والإسم غير المنصرف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7" draw:style-name="gr19" draw:text-style-name="P15" draw:layer="layout" svg:width="2.156cm" svg:height="1.791cm" svg:x="29.436cm" svg:y="1.626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Picture 4" draw:style-name="gr1" draw:text-style-name="P1" draw:layer="layout" svg:width="35.138cm" svg:height="19.765cm" svg:x="-0.391cm" svg:y="0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Rectangle 84" draw:style-name="gr20" draw:text-style-name="P16" draw:layer="layout" svg:width="4.263cm" svg:height="1.201cm" svg:x="14.667cm" svg:y="2.2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" draw:text-style-name="P16" draw:layer="layout" svg:width="3.946cm" svg:height="1.702cm" svg:x="14.985cm" svg:y="6.4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" draw:text-style-name="P16" draw:layer="layout" svg:width="3.946cm" svg:height="1.623cm" svg:x="14.985cm" svg:y="10.3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20" draw:text-style-name="P16" draw:layer="layout" svg:width="3.722cm" svg:height="1.623cm" svg:x="15.283cm" svg:y="14.5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1" draw:text-style-name="P17" draw:layer="layout" svg:width="4.592cm" svg:height="1.968cm" svg:x="27.996cm" svg:y="7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2" draw:text-style-name="P19" xml:id="id1" draw:id="id1" draw:layer="layout" svg:width="3.946cm" svg:height="1.623cm" svg:x="27.56cm" svg:y="8.18cm">
          <text:p text:style-name="P18"><text:span text:style-name="T7">الكلا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7" draw:style-name="gr23" draw:text-style-name="P1" draw:layer="layout" draw:type="line" svg:x1="27.56cm" svg:y1="8.992cm" svg:x2="20.263cm" svg:y2="2.614cm" draw:start-shape="id1" draw:start-glue-point="5" svg:d="M27560 8992l-7297-6378" svg:viewBox="0 0 7298 6379">
          <text:p/>
        </draw:connector>
        <draw:connector draw:name="Straight Connector 8" draw:style-name="gr23" draw:text-style-name="P1" draw:layer="layout" draw:type="line" svg:x1="27.56cm" svg:y1="8.992cm" svg:x2="20.263cm" svg:y2="6.985cm" draw:start-shape="id1" draw:start-glue-point="5" svg:d="M27560 8992l-7297-2007" svg:viewBox="0 0 7298 2008">
          <text:p/>
        </draw:connector>
        <draw:connector draw:name="Straight Connector 10" draw:style-name="gr23" draw:text-style-name="P1" draw:layer="layout" draw:type="line" svg:x1="27.56cm" svg:y1="8.992cm" svg:x2="20.699cm" svg:y2="11.218cm" draw:start-shape="id1" draw:start-glue-point="5" svg:d="M27560 8992l-6861 2226" svg:viewBox="0 0 6862 2227">
          <text:p/>
        </draw:connector>
        <draw:connector draw:name="Straight Connector 11" draw:style-name="gr23" draw:text-style-name="P1" draw:layer="layout" draw:type="line" svg:x1="27.56cm" svg:y1="8.992cm" svg:x2="20.886cm" svg:y2="15.248cm" draw:start-shape="id1" draw:start-glue-point="5" svg:d="M27560 8992l-6674 6256" svg:viewBox="0 0 6675 6257">
          <text:p/>
        </draw:connector>
        <draw:connector draw:name="Straight Arrow Connector 27" draw:style-name="gr24" draw:text-style-name="P1" draw:layer="layout" draw:type="line" svg:x1="20.344cm" svg:y1="2.652cm" svg:x2="19.062cm" svg:y2="2.614cm" svg:d="M20344 2652l-1282-38" svg:viewBox="0 0 1283 39">
          <text:p/>
        </draw:connector>
        <draw:connector draw:name="Straight Arrow Connector 28" draw:style-name="gr24" draw:text-style-name="P1" draw:layer="layout" draw:type="line" svg:x1="20.967cm" svg:y1="15.248cm" svg:x2="19.249cm" svg:y2="15.248cm" svg:d="M20967 15248h-1718" svg:viewBox="0 0 1719 1">
          <text:p/>
        </draw:connector>
        <draw:connector draw:name="Straight Arrow Connector 29" draw:style-name="gr24" draw:text-style-name="P1" draw:layer="layout" draw:type="line" svg:x1="20.78cm" svg:y1="11.218cm" svg:x2="19.062cm" svg:y2="11.218cm" svg:d="M20780 11218h-1718" svg:viewBox="0 0 1719 1">
          <text:p/>
        </draw:connector>
        <draw:connector draw:name="Straight Arrow Connector 30" draw:style-name="gr24" draw:text-style-name="P1" draw:layer="layout" draw:type="line" svg:x1="20.344cm" svg:y1="6.984cm" svg:x2="19.005cm" svg:y2="6.985cm" svg:d="M20344 6984l-1339 1" svg:viewBox="0 0 1340 2">
          <text:p/>
        </draw:connector>
        <draw:custom-shape draw:name="TextBox 38" draw:style-name="gr25" draw:text-style-name="P7" draw:layer="layout" svg:width="2.586cm" svg:height="1.623cm" svg:x="15.663cm" svg:y="2.102cm">
          <text:p text:style-name="P6"><text:span text:style-name="T7">اللف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6" draw:text-style-name="P7" draw:layer="layout" svg:width="2.548cm" svg:height="1.623cm" svg:x="15.14cm" svg:y="6.512cm">
          <text:p text:style-name="P6"><text:span text:style-name="T7">المرك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7" draw:text-style-name="P7" draw:layer="layout" svg:width="2.576cm" svg:height="1.623cm" svg:x="15.782cm" svg:y="10.451cm">
          <text:p text:style-name="P6"><text:span text:style-name="T7">المفيد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8" draw:text-style-name="P7" draw:layer="layout" svg:width="2.941cm" svg:height="1.623cm" svg:x="15.72cm" svg:y="14.584cm">
          <text:p text:style-name="P6"><text:span text:style-name="T7">با الض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24" draw:text-style-name="P1" draw:layer="layout" draw:type="line" svg:x1="14.605cm" svg:y1="2.652cm" svg:x2="12.513cm" svg:y2="2.652cm" svg:d="M14605 2652h-2092" svg:viewBox="0 0 2093 1">
          <text:p/>
        </draw:connector>
        <draw:connector draw:name="Straight Arrow Connector 53" draw:style-name="gr24" draw:text-style-name="P1" draw:layer="layout" draw:type="line" svg:x1="14.663cm" svg:y1="15.279cm" svg:x2="11.953cm" svg:y2="15.248cm" svg:d="M14663 15279l-2710-31" svg:viewBox="0 0 2711 32">
          <text:p/>
        </draw:connector>
        <draw:connector draw:name="Straight Arrow Connector 54" draw:style-name="gr24" draw:text-style-name="P1" draw:layer="layout" draw:type="line" svg:x1="14.605cm" svg:y1="11.218cm" svg:x2="12.513cm" svg:y2="11.218cm" svg:d="M14605 11218h-2092" svg:viewBox="0 0 2093 1">
          <text:p/>
        </draw:connector>
        <draw:connector draw:name="Straight Arrow Connector 55" draw:style-name="gr24" draw:text-style-name="P1" draw:layer="layout" draw:type="line" svg:x1="14.605cm" svg:y1="7.395cm" svg:x2="12.513cm" svg:y2="7.395cm" svg:d="M14605 7395h-2092" svg:viewBox="0 0 2093 1">
          <text:p/>
        </draw:connector>
        <draw:custom-shape draw:name="TextBox 56" draw:style-name="gr29" draw:text-style-name="P21" draw:layer="layout" svg:width="10.034cm" svg:height="2.649cm" svg:x="2.063cm" svg:y="1.723cm">
          <text:p text:style-name="P20"><text:span text:style-name="T8">الصوت المشتمل على بعض حروف الهجائي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0" draw:text-style-name="P21" draw:layer="layout" svg:width="9.157cm" svg:height="2.649cm" svg:x="3.273cm" svg:y="10.413cm">
          <text:p text:style-name="P20"><text:span text:style-name="T8">أفاد فائدة يحسن السكوت من المتكلم والسام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1" draw:text-style-name="P7" draw:layer="layout" svg:width="3.42cm" svg:height="1.452cm" svg:x="8.728cm" svg:y="14.584cm">
          <text:p text:style-name="P6"><text:span text:style-name="T8">با القصد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2" draw:text-style-name="P7" draw:layer="layout" svg:width="7.593cm" svg:height="1.452cm" svg:x="4.999cm" svg:y="6.565cm">
          <text:p text:style-name="P6"><text:span text:style-name="T8">ما تركب من كلمتين فأكث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7" draw:style-name="gr23" draw:text-style-name="P1" draw:layer="layout" draw:type="line" svg:x1="14.605cm" svg:y1="15.31cm" svg:x2="13.559cm" svg:y2="16.397cm" svg:d="M14605 15310l-1046 1087" svg:viewBox="0 0 1047 1088">
          <text:p/>
        </draw:connector>
        <draw:connector draw:name="Straight Arrow Connector 70" draw:style-name="gr33" draw:text-style-name="P1" draw:layer="layout" draw:type="line" svg:x1="13.559cm" svg:y1="16.397cm" svg:x2="12.098cm" svg:y2="16.397cm" svg:d="M13559 16397h-1461" svg:viewBox="0 0 1462 1">
          <text:p/>
        </draw:connector>
        <draw:custom-shape draw:name="TextBox 81" draw:style-name="gr34" draw:text-style-name="P7" draw:layer="layout" svg:width="4.533cm" svg:height="1.452cm" svg:x="7.926cm" svg:y="15.69cm">
          <text:p text:style-name="P6"><text:span text:style-name="T8">بالوضع العرب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35" draw:text-style-name="P22" draw:layer="layout" svg:width="6.157cm" svg:height="2.649cm" svg:x="25.59cm" svg:y="15.004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6" draw:text-style-name="P7" draw:layer="layout" svg:width="2.262cm" svg:height="1.794cm" svg:x="27.538cm" svg:y="15.325cm">
          <text:p text:style-name="P6"><text:span text:style-name="T10">رجو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draw:name="Picture 2" draw:style-name="gr1" draw:text-style-name="P1" draw:layer="layout" svg:width="32.711cm" svg:height="18.4cm" svg:x="0.577cm" svg:y="0.325cm">
          <draw:image xlink:href="Pictures/10000000000002E00000019EF4441F90.jpg" xlink:type="simple" xlink:show="embed" xlink:actuate="onLoad" draw:mime-type="image/jpeg">
            <text:p/>
          </draw:image>
        </draw:frame>
        <draw:custom-shape draw:name="Rectangle 34" draw:style-name="gr37" draw:text-style-name="P23" draw:layer="layout" svg:width="8.284cm" svg:height="3.442cm" svg:x="23.96cm" svg:y="13.1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0" draw:text-style-name="P24" xml:id="id2" draw:id="id2" draw:layer="layout" svg:width="4.174cm" svg:height="1.409cm" svg:x="19.604cm" svg:y="7.0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0" draw:text-style-name="P24" draw:layer="layout" svg:width="3.583cm" svg:height="1.281cm" svg:x="26.096cm" svg:y="9.7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" draw:text-style-name="P24" draw:layer="layout" svg:width="3.583cm" svg:height="1.11cm" svg:x="26.096cm" svg:y="7.3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8" draw:text-style-name="P7" draw:layer="layout" svg:width="3.264cm" svg:height="1.281cm" svg:x="26.415cm" svg:y="7.248cm">
          <text:p text:style-name="P6"><text:span text:style-name="T11">الإِعْرَاب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" draw:style-name="gr39" draw:text-style-name="P1" draw:layer="layout" draw:type="line" svg:x1="28.102cm" svg:y1="11.508cm" svg:x2="28.102cm" svg:y2="12.989cm" svg:d="M28102 11508v1481" svg:viewBox="0 0 1 1482">
          <text:p/>
        </draw:connector>
        <draw:custom-shape draw:name="TextBox 7" draw:style-name="gr40" draw:text-style-name="P10" draw:layer="layout" svg:width="7.227cm" svg:height="4.103cm" svg:x="24.453cm" svg:y="13.38cm">
          <text:p text:style-name="P9"><text:span text:style-name="T12">هُوَ تَغْيِيرُ أَوَاخِرِ الْكَلِمِ لِاخْتِلافِ الْعَوَامِلِ الدَّاخِلَةِ عَلَيْهَا لَفْظَا أَوْ تقديراً</text:span><text:span text:style-name="T12"> </text:span></text:p>
          <text:p text:style-name="P9"><text:span text:style-name="T1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1" draw:text-style-name="P7" draw:layer="layout" svg:width="2.551cm" svg:height="1.11cm" svg:x="26.827cm" svg:y="10.006cm">
          <text:p text:style-name="P6"><text:span text:style-name="T14">تعري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2" draw:style-name="gr42" draw:text-style-name="P1" draw:layer="layout" draw:type="line" svg:x1="27.992cm" svg:y1="8.588cm" svg:x2="27.992cm" svg:y2="9.582cm" svg:d="M27992 8588v994" svg:viewBox="0 0 1 995">
          <text:p/>
        </draw:connector>
        <draw:custom-shape draw:name="TextBox 13" draw:style-name="gr43" draw:text-style-name="P7" draw:layer="layout" svg:width="4.09cm" svg:height="2.307cm" svg:x="19.81cm" svg:y="6.196cm">
          <text:p text:style-name="P6"><text:span text:style-name="T15"/></text:p>
          <text:p text:style-name="P6"><text:span text:style-name="T15">أَقْسَامُهُ أَرْبَعَة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42" draw:text-style-name="P1" draw:layer="layout" draw:type="line" svg:x1="25.852cm" svg:y1="7.956cm" svg:x2="23.938cm" svg:y2="7.956cm" svg:d="M25852 7956h-1914" svg:viewBox="0 0 1915 1">
          <text:p/>
        </draw:connector>
        <draw:custom-shape draw:name="Rectangle 27" draw:style-name="gr20" draw:text-style-name="P24" draw:layer="layout" svg:width="4.09cm" svg:height="1.026cm" svg:x="5.99cm" svg:y="2.9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0" draw:text-style-name="P24" draw:layer="layout" svg:width="4.09cm" svg:height="1.026cm" svg:x="5.99cm" svg:y="5.7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0" draw:text-style-name="P24" draw:layer="layout" svg:width="4.09cm" svg:height="1.026cm" svg:x="6.024cm" svg:y="8.0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0" draw:text-style-name="P24" draw:layer="layout" svg:width="4.09cm" svg:height="1.026cm" svg:x="5.99cm" svg:y="10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6" draw:style-name="gr42" draw:text-style-name="P1" draw:layer="layout" draw:type="line" svg:x1="19.604cm" svg:y1="7.799cm" svg:x2="12.282cm" svg:y2="3.456cm" draw:start-shape="id2" draw:start-glue-point="5" svg:d="M19604 7799l-7322-4343" svg:viewBox="0 0 7323 4344">
          <text:p/>
        </draw:connector>
        <draw:connector draw:name="Straight Connector 38" draw:style-name="gr42" draw:text-style-name="P1" draw:layer="layout" draw:type="line" svg:x1="19.604cm" svg:y1="7.799cm" svg:x2="12.282cm" svg:y2="6.244cm" draw:start-shape="id2" draw:start-glue-point="5" svg:d="M19604 7799l-7322-1555" svg:viewBox="0 0 7323 1556">
          <text:p/>
        </draw:connector>
        <draw:connector draw:name="Straight Connector 40" draw:style-name="gr42" draw:text-style-name="P1" draw:layer="layout" draw:type="line" svg:x1="19.604cm" svg:y1="7.799cm" svg:x2="12.282cm" svg:y2="8.588cm" draw:start-shape="id2" draw:start-glue-point="5" svg:d="M19604 7799l-7322 789" svg:viewBox="0 0 7323 790">
          <text:p/>
        </draw:connector>
        <draw:connector draw:name="Straight Connector 42" draw:style-name="gr42" draw:text-style-name="P1" draw:layer="layout" draw:type="line" svg:x1="19.604cm" svg:y1="7.799cm" svg:x2="12.282cm" svg:y2="10.791cm" draw:start-shape="id2" draw:start-glue-point="5" svg:d="M19604 7799l-7322 2992" svg:viewBox="0 0 7323 2993">
          <text:p/>
        </draw:connector>
        <draw:connector draw:name="Straight Arrow Connector 44" draw:style-name="gr39" draw:text-style-name="P1" draw:layer="layout" draw:type="line" svg:x1="12.282cm" svg:y1="3.456cm" svg:x2="10.612cm" svg:y2="3.456cm" svg:d="M12282 3456h-1670" svg:viewBox="0 0 1671 1">
          <text:p/>
        </draw:connector>
        <draw:connector draw:name="Straight Arrow Connector 46" draw:style-name="gr39" draw:text-style-name="P1" draw:layer="layout" draw:type="line" svg:x1="12.282cm" svg:y1="6.244cm" svg:x2="10.612cm" svg:y2="6.244cm" svg:d="M12282 6244h-1670" svg:viewBox="0 0 1671 1">
          <text:p/>
        </draw:connector>
        <draw:connector draw:name="Straight Arrow Connector 48" draw:style-name="gr44" draw:text-style-name="P1" draw:layer="layout" draw:type="line" svg:x1="12.282cm" svg:y1="8.591cm" svg:x2="10.612cm" svg:y2="8.591cm" svg:d="M12282 8591h-1670" svg:viewBox="0 0 1671 1">
          <text:p/>
        </draw:connector>
        <draw:connector draw:name="Straight Arrow Connector 50" draw:style-name="gr39" draw:text-style-name="P1" draw:layer="layout" draw:type="line" svg:x1="12.282cm" svg:y1="10.791cm" svg:x2="10.925cm" svg:y2="10.791cm" svg:d="M12282 10791h-1357" svg:viewBox="0 0 1358 1">
          <text:p/>
        </draw:connector>
        <draw:custom-shape draw:name="TextBox 53" draw:style-name="gr45" draw:text-style-name="P7" draw:layer="layout" svg:width="2.526cm" svg:height="1.025cm" svg:x="6.966cm" svg:y="2.927cm">
          <text:p text:style-name="P6"><text:span text:style-name="T16">رَفْعُ</text:span><text:span text:style-name="T16"> 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6" draw:text-style-name="P7" draw:layer="layout" svg:width="2.89cm" svg:height="1.025cm" svg:x="6.852cm" svg:y="5.731cm">
          <text:p text:style-name="P6"><text:span text:style-name="T16"><text:s/></text:span><text:span text:style-name="T16">وَنَصْب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7" draw:text-style-name="P7" draw:layer="layout" svg:width="2.89cm" svg:height="1.025cm" svg:x="6.852cm" svg:y="8.06cm">
          <text:p text:style-name="P6"><text:span text:style-name="T16"><text:s/></text:span><text:span text:style-name="T16">وَخَفْض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8" draw:text-style-name="P7" draw:layer="layout" svg:width="2.171cm" svg:height="1.025cm" svg:x="6.984cm" svg:y="10.091cm">
          <text:p text:style-name="P6"><text:span text:style-name="T16">وَجَزْمٌ</text:span><text:span text:style-name="T16">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9" draw:text-style-name="P7" draw:layer="layout" svg:width="2.262cm" svg:height="1.794cm" svg:x="6.885cm" svg:y="14.958cm">
          <text:p text:style-name="P6"><text:span text:style-name="T10">رجو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19" draw:text-style-name="P15" draw:layer="layout" svg:width="4.09cm" svg:height="2.973cm" svg:x="4.906cm" svg:y="14.509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Picture 4" draw:style-name="gr1" draw:text-style-name="P1" draw:layer="layout" svg:width="32.351cm" svg:height="18.133cm" svg:x="0.758cm" svg:y="0.458cm">
          <draw:image xlink:href="Pictures/10000000000002DF0000019C3D3D1E0D.jpg" xlink:type="simple" xlink:show="embed" xlink:actuate="onLoad" draw:mime-type="image/jpeg">
            <text:p/>
          </draw:image>
        </draw:frame>
        <draw:custom-shape draw:name="Rectangle 3" draw:style-name="gr5" draw:text-style-name="P23" draw:layer="layout" svg:width="8.767cm" svg:height="1.926cm" svg:x="23.991cm" svg:y="9.0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" draw:style-name="gr42" draw:text-style-name="P1" draw:layer="layout" draw:type="line" svg:x1="17.154cm" svg:y1="3.712cm" svg:x2="23.973cm" svg:y2="9.697cm" svg:d="M17154 3712l6819 5985" svg:viewBox="0 0 6820 5986">
          <text:p/>
        </draw:connector>
        <draw:connector draw:name="Straight Connector 8" draw:style-name="gr42" draw:text-style-name="P1" draw:layer="layout" draw:type="line" svg:x1="23.973cm" svg:y1="9.697cm" svg:x2="16.353cm" svg:y2="16.038cm" svg:d="M23973 9697l-7620 6341" svg:viewBox="0 0 7621 6342">
          <text:p/>
        </draw:connector>
        <draw:connector draw:name="Straight Arrow Connector 12" draw:style-name="gr39" draw:text-style-name="P1" draw:layer="layout" draw:type="line" svg:x1="17.154cm" svg:y1="3.653cm" svg:x2="16.398cm" svg:y2="3.653cm" svg:d="M17154 3653h-756" svg:viewBox="0 0 757 1">
          <text:p/>
        </draw:connector>
        <draw:connector draw:name="Straight Arrow Connector 14" draw:style-name="gr39" draw:text-style-name="P1" draw:layer="layout" draw:type="line" svg:x1="16.388cm" svg:y1="16.038cm" svg:x2="15.831cm" svg:y2="16.038cm" svg:d="M16388 16038h-557" svg:viewBox="0 0 558 1">
          <text:p/>
        </draw:connector>
        <draw:custom-shape draw:name="TextBox 15" draw:style-name="gr50" draw:text-style-name="P7" draw:layer="layout" svg:width="6.227cm" svg:height="1.452cm" svg:x="26.028cm" svg:y="9.245cm">
          <text:p text:style-name="P6"><text:span text:style-name="T17">المعربات قسمان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" draw:text-style-name="P23" draw:layer="layout" svg:width="8.767cm" svg:height="1.926cm" svg:x="6.127cm" svg:y="3.2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" draw:text-style-name="P23" draw:layer="layout" svg:width="8.767cm" svg:height="1.926cm" svg:x="6.802cm" svg:y="15.0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1" draw:text-style-name="P7" draw:layer="layout" svg:width="6.424cm" svg:height="1.452cm" svg:x="7.974cm" svg:y="3.461cm">
          <text:p text:style-name="P6"><text:span text:style-name="T17">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2" draw:text-style-name="P7" draw:layer="layout" svg:width="5.466cm" svg:height="1.452cm" svg:x="8.932cm" svg:y="15.211cm">
          <text:p text:style-name="P6"><text:span text:style-name="T17">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53" draw:text-style-name="P22" draw:layer="layout" svg:width="6.157cm" svg:height="2.649cm" svg:x="25.457cm" svg:y="14.90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54" draw:text-style-name="P7" draw:layer="layout" svg:width="2.097cm" svg:height="1.794cm" svg:x="27.404cm" svg:y="15.226cm">
          <text:p text:style-name="P6"><text:span text:style-name="T10">التال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Picture 13" draw:style-name="gr1" draw:text-style-name="P1" draw:layer="layout" svg:width="32.679cm" svg:height="18.381cm" svg:x="0.437cm" svg:y="0.334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Rectangle 3" draw:style-name="gr21" draw:text-style-name="P25" draw:layer="layout" svg:width="8.767cm" svg:height="1.926cm" svg:x="23.747cm" svg:y="8.0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1" draw:text-style-name="P25" draw:layer="layout" svg:width="8.767cm" svg:height="1.926cm" svg:x="9.667cm" svg:y="1.27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25" draw:layer="layout" svg:width="8.767cm" svg:height="1.926cm" svg:x="9.667cm" svg:y="13.4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25" draw:layer="layout" svg:width="8.767cm" svg:height="1.926cm" svg:x="9.667cm" svg:y="9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5" draw:layer="layout" svg:width="8.767cm" svg:height="1.926cm" svg:x="9.551cm" svg:y="5.7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5" draw:text-style-name="P7" draw:layer="layout" svg:width="6.993cm" svg:height="1.452cm" svg:x="25.522cm" svg:y="8.343cm">
          <text:p text:style-name="P6"><text:span text:style-name="T17">الذي 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6" draw:text-style-name="P7" draw:layer="layout" svg:width="4.661cm" svg:height="1.452cm" svg:x="12.259cm" svg:y="1.556cm">
          <text:p text:style-name="P6"><text:span text:style-name="T17">الإسم المفرد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7" draw:text-style-name="P7" draw:layer="layout" svg:width="4.661cm" svg:height="1.452cm" svg:x="12.114cm" svg:y="6.165cm">
          <text:p text:style-name="P6"><text:span text:style-name="T17">جمع التكسي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8" draw:text-style-name="P7" draw:layer="layout" svg:width="5.908cm" svg:height="1.452cm" svg:x="11.636cm" svg:y="9.797cm">
          <text:p text:style-name="P6"><text:span text:style-name="T17">جمع المؤنث السال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9" draw:text-style-name="P7" draw:layer="layout" svg:width="5.572cm" svg:height="1.452cm" svg:x="11.636cm" svg:y="13.728cm">
          <text:p text:style-name="P6"><text:span text:style-name="T17">إسم غير منصر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6" draw:style-name="gr60" draw:text-style-name="P1" draw:layer="layout" draw:line-skew="3.516cm" svg:x1="23.712cm" svg:y1="9.07cm" svg:x2="20.981cm" svg:y2="2.038cm" svg:d="M23712 9070h-2731v-7032" svg:viewBox="0 0 2732 7033">
          <text:p/>
        </draw:connector>
        <draw:connector draw:name="Connector: Elbow 21" draw:style-name="gr60" draw:text-style-name="P1" draw:layer="layout" draw:line-skew="-2.719cm" svg:x1="23.747cm" svg:y1="9.125cm" svg:x2="21.015cm" svg:y2="14.564cm" svg:d="M23747 9125v1h-2732v5438" svg:viewBox="0 0 2733 5440">
          <text:p/>
        </draw:connector>
        <draw:connector draw:name="Straight Arrow Connector 24" draw:style-name="gr61" draw:text-style-name="P1" draw:layer="layout" draw:type="line" svg:x1="21.015cm" svg:y1="2.038cm" svg:x2="19.067cm" svg:y2="2.038cm" svg:d="M21015 2038h-1948" svg:viewBox="0 0 1949 1">
          <text:p/>
        </draw:connector>
        <draw:connector draw:name="Straight Arrow Connector 26" draw:style-name="gr61" draw:text-style-name="P1" draw:layer="layout" draw:type="line" svg:x1="21.015cm" svg:y1="14.454cm" svg:x2="19.102cm" svg:y2="14.454cm" svg:d="M21015 14454h-1913" svg:viewBox="0 0 1914 1">
          <text:p/>
        </draw:connector>
        <draw:connector draw:name="Straight Arrow Connector 29" draw:style-name="gr61" draw:text-style-name="P1" draw:layer="layout" draw:type="line" svg:x1="20.946cm" svg:y1="6.685cm" svg:x2="19.067cm" svg:y2="6.685cm" svg:d="M20946 6685h-1879" svg:viewBox="0 0 1880 1">
          <text:p/>
        </draw:connector>
        <draw:connector draw:name="Straight Arrow Connector 31" draw:style-name="gr61" draw:text-style-name="P1" draw:layer="layout" draw:type="line" svg:x1="20.981cm" svg:y1="10.523cm" svg:x2="19.345cm" svg:y2="10.523cm" svg:d="M20981 10523h-1636" svg:viewBox="0 0 1637 1">
          <text:p/>
        </draw:connector>
        <draw:custom-shape draw:name="Oval 2" draw:style-name="gr62" draw:text-style-name="P22" draw:layer="layout" svg:width="6.157cm" svg:height="2.649cm" svg:x="25.457cm" svg:y="14.906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" draw:style-name="gr63" draw:text-style-name="P7" draw:layer="layout" svg:width="2.097cm" svg:height="1.794cm" svg:x="27.404cm" svg:y="15.226cm">
          <text:p text:style-name="P6"><text:span text:style-name="T10">التال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Picture 10" draw:style-name="gr64" draw:text-style-name="P26" draw:layer="layout" svg:width="32.308cm" svg:height="18.173cm" svg:x="0.786cm" svg:y="0.77cm">
          <draw:image xlink:href="Pictures/10000000000002E00000019EFC1FD9D1.jpg" xlink:type="simple" xlink:show="embed" xlink:actuate="onLoad" draw:mime-type="image/jpeg">
            <text:p/>
          </draw:image>
        </draw:frame>
        <draw:custom-shape draw:name="Rectangle 3" draw:style-name="gr65" draw:text-style-name="P27" draw:layer="layout" svg:width="8.767cm" svg:height="1.926cm" svg:x="23.747cm" svg:y="7.9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5" draw:text-style-name="P27" draw:layer="layout" svg:width="8.767cm" svg:height="1.926cm" svg:x="10.525cm" svg:y="4.4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5" draw:text-style-name="P27" draw:layer="layout" svg:width="8.767cm" svg:height="1.926cm" svg:x="10.525cm" svg:y="11.81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5" draw:text-style-name="P27" draw:layer="layout" svg:width="8.767cm" svg:height="1.926cm" svg:x="10.525cm" svg:y="8.0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6" draw:text-style-name="P7" draw:layer="layout" svg:width="6.993cm" svg:height="1.452cm" svg:x="25.522cm" svg:y="8.343cm">
          <text:p text:style-name="P6"><text:span text:style-name="T17">الذي يعرب باالحرو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7" draw:text-style-name="P7" draw:layer="layout" svg:width="4.661cm" svg:height="1.452cm" svg:x="12.578cm" svg:y="4.687cm">
          <text:p text:style-name="P6"><text:span text:style-name="T17">الأسماء الخمس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8" draw:text-style-name="P7" draw:layer="layout" svg:width="16.927cm" svg:height="2.649cm" svg:x="13.057cm" svg:y="8.429cm">
          <text:p text:style-name="P6"><text:span text:style-name="T17">الإسم المثنى</text:span></text:p>
          <text:p text:style-name="P6"><text:span text:style-name="T1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9" draw:text-style-name="P7" draw:layer="layout" svg:width="16.927cm" svg:height="1.452cm" svg:x="12.433cm" svg:y="12.024cm">
          <text:p text:style-name="P6"><text:span text:style-name="T17">جمع المذكر السال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70" draw:text-style-name="P1" draw:layer="layout" draw:type="line" svg:x1="23.747cm" svg:y1="9.046cm" svg:x2="21.433cm" svg:y2="9.046cm" svg:d="M23747 9046h-2314" svg:viewBox="0 0 2315 1">
          <text:p/>
        </draw:connector>
        <draw:connector draw:name="Straight Connector 17" draw:style-name="gr70" draw:text-style-name="P1" draw:layer="layout" draw:type="line" svg:x1="21.433cm" svg:y1="9.046cm" svg:x2="21.433cm" svg:y2="5.358cm" svg:d="M21433 9046v-3688" svg:viewBox="0 0 1 3689">
          <text:p/>
        </draw:connector>
        <draw:connector draw:name="Straight Connector 22" draw:style-name="gr70" draw:text-style-name="P1" draw:layer="layout" draw:type="line" svg:x1="21.433cm" svg:y1="8.918cm" svg:x2="21.52cm" svg:y2="13.047cm" svg:d="M21433 8918l87 4129" svg:viewBox="0 0 88 4130">
          <text:p/>
        </draw:connector>
        <draw:connector draw:name="Straight Arrow Connector 27" draw:style-name="gr71" draw:text-style-name="P1" draw:layer="layout" draw:type="line" svg:x1="21.433cm" svg:y1="5.358cm" svg:x2="20.772cm" svg:y2="5.358cm" svg:d="M21433 5358h-661" svg:viewBox="0 0 662 1">
          <text:p/>
        </draw:connector>
        <draw:connector draw:name="Straight Arrow Connector 30" draw:style-name="gr71" draw:text-style-name="P1" draw:layer="layout" draw:type="line" svg:x1="21.433cm" svg:y1="9.046cm" svg:x2="20.424cm" svg:y2="9.046cm" svg:d="M21433 9046h-1009" svg:viewBox="0 0 1010 1">
          <text:p/>
        </draw:connector>
        <draw:connector draw:name="Straight Arrow Connector 33" draw:style-name="gr71" draw:text-style-name="P1" draw:layer="layout" draw:type="line" svg:x1="21.476cm" svg:y1="13.047cm" svg:x2="20.676cm" svg:y2="13.047cm" svg:d="M21476 13047h-800" svg:viewBox="0 0 801 1">
          <text:p/>
        </draw:connector>
        <draw:custom-shape draw:name="Oval 1" draw:style-name="gr72" draw:text-style-name="P22" draw:layer="layout" svg:width="6.157cm" svg:height="2.649cm" svg:x="25.59cm" svg:y="15.004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" draw:style-name="gr73" draw:text-style-name="P7" draw:layer="layout" svg:width="2.262cm" svg:height="1.794cm" svg:x="27.538cm" svg:y="15.325cm">
          <text:p text:style-name="P6"><text:span text:style-name="T10">رجو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Picture 5" draw:style-name="gr74" draw:text-style-name="P28" draw:layer="layout" svg:width="32.195cm" svg:height="18.109cm" svg:x="1.108cm" svg:y="0.47cm">
          <draw:image xlink:href="Pictures/10000000000002E00000019EF4441F90.jpg" xlink:type="simple" xlink:show="embed" xlink:actuate="onLoad" draw:mime-type="image/jpeg">
            <text:p/>
          </draw:image>
        </draw:frame>
        <draw:custom-shape draw:name="Oval 27" draw:style-name="gr75" draw:text-style-name="P29" draw:layer="layout" svg:width="0.406cm" svg:height="0.423cm" draw:transform="rotate (-2.60979083050712) translate (8.389cm 15.598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75" draw:text-style-name="P29" draw:layer="layout" svg:width="0.406cm" svg:height="0.423cm" draw:transform="rotate (-2.60979083050712) translate (8.672cm 9.537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75" draw:text-style-name="P29" draw:layer="layout" svg:width="0.406cm" svg:height="0.423cm" draw:transform="rotate (-2.60979083050712) translate (8.768cm 3.944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76" draw:text-style-name="P7" draw:layer="layout" svg:width="8.062cm" svg:height="1.794cm" svg:x="12.822cm" svg:y="1.074cm">
          <text:p text:style-name="P6"><text:span text:style-name="T19">الذي 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7" draw:text-style-name="P10" draw:layer="layout" svg:width="8.454cm" svg:height="2.136cm" svg:x="25.731cm" svg:y="8.578cm">
          <text:p text:style-name="P9"><text:span text:style-name="T20">الاسم المفرد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42" draw:text-style-name="P1" draw:layer="layout" draw:type="line" svg:x1="27.418cm" svg:y1="9.524cm" svg:x2="22.825cm" svg:y2="9.524cm" svg:d="M27418 9524h-4593" svg:viewBox="0 0 4594 1">
          <text:p/>
        </draw:connector>
        <draw:connector draw:name="Straight Connector 15" draw:style-name="gr42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42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42" draw:text-style-name="P1" draw:layer="layout" draw:type="line" svg:x1="22.825cm" svg:y1="4.001cm" svg:x2="20.285cm" svg:y2="4.001cm" svg:d="M22825 4001h-2540" svg:viewBox="0 0 2541 1">
          <text:p/>
        </draw:connector>
        <draw:connector draw:name="Straight Connector 23" draw:style-name="gr23" draw:text-style-name="P1" draw:layer="layout" draw:type="line" svg:x1="22.825cm" svg:y1="9.524cm" svg:x2="20.285cm" svg:y2="9.524cm" svg:d="M22825 9524h-2540" svg:viewBox="0 0 2541 1">
          <text:p/>
        </draw:connector>
        <draw:connector draw:name="Straight Connector 26" draw:style-name="gr42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78" draw:text-style-name="P7" draw:layer="layout" svg:width="2.539cm" svg:height="1.794cm" svg:x="17.937cm" svg:y="3.438cm">
          <text:p text:style-name="P6"><text:span text:style-name="T21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79" draw:text-style-name="P7" draw:layer="layout" svg:width="5.032cm" svg:height="1.794cm" svg:x="17.519cm" svg:y="8.898cm">
          <text:p text:style-name="P6"><text:span text:style-name="T19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0" draw:text-style-name="P7" draw:layer="layout" svg:width="2.239cm" svg:height="1.794cm" svg:x="17.954cm" svg:y="14.359cm">
          <text:p text:style-name="P6"><text:span text:style-name="T22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39" draw:text-style-name="P1" draw:layer="layout" draw:type="line" svg:x1="17.205cm" svg:y1="4.001cm" svg:x2="14.909cm" svg:y2="4.001cm" svg:d="M17205 4001h-2296" svg:viewBox="0 0 2297 1">
          <text:p/>
        </draw:connector>
        <draw:connector draw:name="Straight Arrow Connector 35" draw:style-name="gr39" draw:text-style-name="P1" draw:layer="layout" draw:type="line" svg:x1="17.205cm" svg:y1="15.031cm" svg:x2="14.909cm" svg:y2="15.031cm" svg:d="M17205 15031h-2296" svg:viewBox="0 0 2297 1">
          <text:p/>
        </draw:connector>
        <draw:connector draw:name="Straight Arrow Connector 36" draw:style-name="gr39" draw:text-style-name="P1" draw:layer="layout" draw:type="line" svg:x1="17.205cm" svg:y1="9.524cm" svg:x2="14.909cm" svg:y2="9.524cm" svg:d="M17205 9524h-2296" svg:viewBox="0 0 2297 1">
          <text:p/>
        </draw:connector>
        <draw:custom-shape draw:name="TextBox 40" draw:style-name="gr81" draw:text-style-name="P7" draw:layer="layout" svg:width="2.904cm" svg:height="1.794cm" svg:x="11.877cm" svg:y="14.337cm">
          <text:p text:style-name="P6"><text:span text:style-name="T22">كسر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2" draw:text-style-name="P7" draw:layer="layout" svg:width="2.707cm" svg:height="1.794cm" svg:x="12.074cm" svg:y="9.012cm">
          <text:p text:style-name="P6"><text:span text:style-name="T23">فتح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83" draw:text-style-name="P7" draw:layer="layout" svg:width="4.209cm" svg:height="1.794cm" svg:x="11.804cm" svg:y="3.409cm">
          <text:p text:style-name="P6"><text:span text:style-name="T21">ضم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84" draw:text-style-name="P7" draw:layer="layout" svg:width="6.743cm" svg:height="1.452cm" svg:x="8.038cm" svg:y="3.58cm">
          <text:p text:style-name="P6"><text:span text:style-name="T24">جَاءَ زَيْد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85" draw:text-style-name="P7" draw:layer="layout" svg:width="4.047cm" svg:height="1.452cm" svg:x="7.829cm" svg:y="9.135cm">
          <text:p text:style-name="P6"><text:span text:style-name="T24">رَأَيْتُ زَيْدًا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86" draw:text-style-name="P7" draw:layer="layout" svg:width="4.557cm" svg:height="1.452cm" svg:x="7.698cm" svg:y="14.53cm">
          <text:p text:style-name="P6"><text:span text:style-name="T24">مَرَرْتُ بِزَيْدٍ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87" draw:text-style-name="P22" draw:layer="layout" svg:width="6.157cm" svg:height="2.649cm" svg:x="25.457cm" svg:y="14.906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88" draw:text-style-name="P7" draw:layer="layout" svg:width="2.097cm" svg:height="1.794cm" svg:x="27.404cm" svg:y="15.226cm">
          <text:p text:style-name="P6"><text:span text:style-name="T10">التال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Picture 5" draw:style-name="gr1" draw:text-style-name="P1" draw:layer="layout" svg:width="32.821cm" svg:height="18.462cm" svg:x="0.762cm" svg:y="0.312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Oval 29" draw:style-name="gr75" draw:text-style-name="P30" draw:layer="layout" svg:width="0.406cm" svg:height="0.423cm" draw:transform="rotate (-2.60979083050712) translate (8.555cm 15.307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75" draw:text-style-name="P30" draw:layer="layout" svg:width="0.406cm" svg:height="0.423cm" draw:transform="rotate (-2.60979083050712) translate (8.64cm 9.242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75" draw:text-style-name="P30" draw:layer="layout" svg:width="0.406cm" svg:height="0.423cm" draw:transform="rotate (-2.60979083050712) translate (9.051cm 3.746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89" draw:text-style-name="P7" draw:layer="layout" svg:width="7.138cm" svg:height="1.623cm" svg:x="12.822cm" svg:y="0.741cm">
          <text:p text:style-name="P6"><text:span text:style-name="T5">الذي 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42" draw:text-style-name="P1" draw:layer="layout" draw:type="line" svg:x1="27.418cm" svg:y1="9.524cm" svg:x2="23.361cm" svg:y2="9.524cm" svg:d="M27418 9524h-4057" svg:viewBox="0 0 4058 1">
          <text:p/>
        </draw:connector>
        <draw:connector draw:name="Straight Connector 15" draw:style-name="gr42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23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42" draw:text-style-name="P1" draw:layer="layout" draw:type="line" svg:x1="22.825cm" svg:y1="4.001cm" svg:x2="20.581cm" svg:y2="4.001cm" svg:d="M22825 4001h-2244" svg:viewBox="0 0 2245 1">
          <text:p/>
        </draw:connector>
        <draw:connector draw:name="Straight Connector 23" draw:style-name="gr23" draw:text-style-name="P1" draw:layer="layout" draw:type="line" svg:x1="22.825cm" svg:y1="9.524cm" svg:x2="20.285cm" svg:y2="9.524cm" svg:d="M22825 9524h-2540" svg:viewBox="0 0 2541 1">
          <text:p/>
        </draw:connector>
        <draw:connector draw:name="Straight Connector 26" draw:style-name="gr42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90" draw:text-style-name="P7" draw:layer="layout" svg:width="2.539cm" svg:height="1.623cm" svg:x="17.937cm" svg:y="3.438cm">
          <text:p text:style-name="P6"><text:span text:style-name="T25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1" draw:text-style-name="P7" draw:layer="layout" svg:width="3.026cm" svg:height="1.623cm" svg:x="17.519cm" svg:y="8.76cm">
          <text:p text:style-name="P6"><text:span text:style-name="T26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92" draw:text-style-name="P7" draw:layer="layout" svg:width="2.006cm" svg:height="1.623cm" svg:x="17.954cm" svg:y="14.359cm">
          <text:p text:style-name="P6"><text:span text:style-name="T27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39" draw:text-style-name="P1" draw:layer="layout" draw:type="line" svg:x1="17.205cm" svg:y1="4.001cm" svg:x2="15.177cm" svg:y2="4.001cm" svg:d="M17205 4001h-2028" svg:viewBox="0 0 2029 1">
          <text:p/>
        </draw:connector>
        <draw:connector draw:name="Straight Arrow Connector 35" draw:style-name="gr39" draw:text-style-name="P1" draw:layer="layout" draw:type="line" svg:x1="17.205cm" svg:y1="15.031cm" svg:x2="15.177cm" svg:y2="15.031cm" svg:d="M17205 15031h-2028" svg:viewBox="0 0 2029 1">
          <text:p/>
        </draw:connector>
        <draw:connector draw:name="Straight Arrow Connector 36" draw:style-name="gr39" draw:text-style-name="P1" draw:layer="layout" draw:type="line" svg:x1="17.205cm" svg:y1="9.524cm" svg:x2="15.177cm" svg:y2="9.524cm" svg:d="M17205 9524h-2028" svg:viewBox="0 0 2029 1">
          <text:p/>
        </draw:connector>
        <draw:custom-shape draw:name="TextBox 40" draw:style-name="gr93" draw:text-style-name="P7" draw:layer="layout" svg:width="2.764cm" svg:height="1.623cm" svg:x="11.871cm" svg:y="14.413cm">
          <text:p text:style-name="P6"><text:span text:style-name="T27">كسر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94" draw:text-style-name="P7" draw:layer="layout" svg:width="2.53cm" svg:height="1.623cm" svg:x="11.957cm" svg:y="8.897cm">
          <text:p text:style-name="P6"><text:span text:style-name="T26">فتح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95" draw:text-style-name="P7" draw:layer="layout" svg:width="2.413cm" svg:height="1.623cm" svg:x="12.074cm" svg:y="3.415cm">
          <text:p text:style-name="P6"><text:span text:style-name="T25">ضم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96" draw:text-style-name="P7" draw:layer="layout" svg:width="3.478cm" svg:height="1.281cm" svg:x="7.989cm" svg:y="3.535cm">
          <text:p text:style-name="P6"><text:span text:style-name="T28">جَاءَ الرِّجَالُ</text:span><text:span text:style-name="T28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97" draw:text-style-name="P7" draw:layer="layout" svg:width="4.314cm" svg:height="1.281cm" svg:x="7.69cm" svg:y="9.047cm">
          <text:p text:style-name="P6"><text:span text:style-name="T28"><text:s/></text:span><text:span text:style-name="T28">رَأَيْتُ الرِّجَالَ</text:span><text:span text:style-name="T28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98" draw:text-style-name="P7" draw:layer="layout" svg:width="4.314cm" svg:height="1.281cm" svg:x="7.556cm" svg:y="14.359cm">
          <text:p text:style-name="P6"><text:span text:style-name="T28">مَرَرْتُ بِالرِّجَالِ</text:span><text:span text:style-name="T28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45" draw:style-name="gr3" draw:text-style-name="P3" draw:layer="layout" svg:width="5.369cm" svg:height="3.565cm" svg:x="27.735cm" svg:y="7.667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6" draw:style-name="gr99" draw:text-style-name="P7" draw:layer="layout" svg:width="2.262cm" svg:height="1.794cm" svg:x="27.538cm" svg:y="15.325cm">
          <text:p text:style-name="P6"><text:span text:style-name="T10">رجو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00" draw:text-style-name="P10" draw:layer="layout" svg:width="4.713cm" svg:height="5.385cm" svg:x="28.062cm" svg:y="7.825cm">
          <text:p text:style-name="P9"><text:span text:style-name="T29">جمع التكسير</text:span></text:p>
          <text:p text:style-name="P9"><text:span text:style-name="T3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19" draw:text-style-name="P15" draw:layer="layout" svg:width="4.015cm" svg:height="3.565cm" svg:x="29.088cm" svg:y="14.41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Picture 10" draw:style-name="gr1" draw:text-style-name="P1" draw:layer="layout" svg:width="32.403cm" svg:height="18.226cm" svg:x="0.731cm" svg:y="0.458cm">
          <draw:image xlink:href="Pictures/10000000000002E00000019EF4441F90.jpg" xlink:type="simple" xlink:show="embed" xlink:actuate="onLoad" draw:mime-type="image/jpeg">
            <text:p/>
          </draw:image>
        </draw:frame>
        <draw:custom-shape draw:name="Oval 8" draw:style-name="gr3" draw:text-style-name="P3" draw:layer="layout" svg:width="2.53cm" svg:height="2.451cm" svg:x="2.433cm" svg:y="8.14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75" draw:text-style-name="P30" draw:layer="layout" svg:width="0.406cm" svg:height="0.423cm" draw:transform="rotate (-2.60979083050712) translate (6.59cm 15.341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75" draw:text-style-name="P30" draw:layer="layout" svg:width="0.406cm" svg:height="0.423cm" draw:transform="rotate (-2.60979083050712) translate (7.878cm 9.834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75" draw:text-style-name="P30" draw:layer="layout" svg:width="0.406cm" svg:height="0.423cm" draw:transform="rotate (-2.60979083050712) translate (7.156cm 3.865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101" draw:text-style-name="P7" draw:layer="layout" svg:width="7.723cm" svg:height="1.623cm" svg:x="12.822cm" svg:y="0.741cm">
          <text:p text:style-name="P6"><text:span text:style-name="T5">الذي 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102" draw:text-style-name="P1" draw:layer="layout" draw:type="line" svg:x1="26.704cm" svg:y1="9.524cm" svg:x2="22.825cm" svg:y2="9.524cm" svg:d="M26704 9524h-3879" svg:viewBox="0 0 3880 1">
          <text:p/>
        </draw:connector>
        <draw:connector draw:name="Straight Connector 15" draw:style-name="gr102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102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102" draw:text-style-name="P1" draw:layer="layout" draw:type="line" svg:x1="22.825cm" svg:y1="4.001cm" svg:x2="20.619cm" svg:y2="4.001cm" svg:d="M22825 4001h-2206" svg:viewBox="0 0 2207 1">
          <text:p/>
        </draw:connector>
        <draw:connector draw:name="Straight Connector 23" draw:style-name="gr102" draw:text-style-name="P1" draw:layer="layout" draw:type="line" svg:x1="22.825cm" svg:y1="9.524cm" svg:x2="20.619cm" svg:y2="9.524cm" svg:d="M22825 9524h-2206" svg:viewBox="0 0 2207 1">
          <text:p/>
        </draw:connector>
        <draw:connector draw:name="Straight Connector 26" draw:style-name="gr102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103" draw:text-style-name="P7" draw:layer="layout" svg:width="2.539cm" svg:height="1.623cm" svg:x="17.937cm" svg:y="3.438cm">
          <text:p text:style-name="P6"><text:span text:style-name="T25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04" draw:text-style-name="P7" draw:layer="layout" svg:width="3.026cm" svg:height="1.623cm" svg:x="17.519cm" svg:y="8.76cm">
          <text:p text:style-name="P6"><text:span text:style-name="T26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05" draw:text-style-name="P7" draw:layer="layout" svg:width="2.262cm" svg:height="1.623cm" svg:x="17.954cm" svg:y="14.359cm">
          <text:p text:style-name="P6"><text:span text:style-name="T27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9" draw:style-name="gr3" draw:text-style-name="P3" draw:layer="layout" svg:width="4.717cm" svg:height="3.944cm" svg:x="27.373cm" svg:y="7.282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onnector draw:name="Straight Arrow Connector 34" draw:style-name="gr106" draw:text-style-name="P1" draw:layer="layout" draw:type="line" svg:x1="17.205cm" svg:y1="4.001cm" svg:x2="15.211cm" svg:y2="4.001cm" svg:d="M17205 4001h-1994" svg:viewBox="0 0 1995 1">
          <text:p/>
        </draw:connector>
        <draw:connector draw:name="Straight Arrow Connector 35" draw:style-name="gr106" draw:text-style-name="P1" draw:layer="layout" draw:type="line" svg:x1="17.205cm" svg:y1="15.031cm" svg:x2="15.211cm" svg:y2="15.031cm" svg:d="M17205 15031h-1994" svg:viewBox="0 0 1995 1">
          <text:p/>
        </draw:connector>
        <draw:connector draw:name="Straight Arrow Connector 36" draw:style-name="gr106" draw:text-style-name="P1" draw:layer="layout" draw:type="line" svg:x1="17.205cm" svg:y1="9.524cm" svg:x2="15.211cm" svg:y2="9.524cm" svg:d="M17205 9524h-1994" svg:viewBox="0 0 1995 1">
          <text:p/>
        </draw:connector>
        <draw:custom-shape draw:name="TextBox 40" draw:style-name="gr107" draw:text-style-name="P7" draw:layer="layout" svg:width="2.262cm" svg:height="1.623cm" svg:x="12.224cm" svg:y="14.311cm">
          <text:p text:style-name="P6"><text:span text:style-name="T27">كسر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8" draw:text-style-name="P7" draw:layer="layout" svg:width="2.53cm" svg:height="2.991cm" svg:x="11.957cm" svg:y="8.897cm">
          <text:p text:style-name="P6"><text:span text:style-name="T27">كسرة</text:span></text:p>
          <text:p text:style-name="P6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9" draw:text-style-name="P7" draw:layer="layout" svg:width="2.53cm" svg:height="1.623cm" svg:x="12.074cm" svg:y="3.415cm">
          <text:p text:style-name="P6"><text:span text:style-name="T25">ضم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0" draw:text-style-name="P7" draw:layer="layout" svg:width="4.996cm" svg:height="1.281cm" svg:x="6.12cm" svg:y="3.501cm">
          <text:p text:style-name="P6"><text:span text:style-name="T28">جَاءَتِ الْمُسْلِمَاتُ</text:span><text:span text:style-name="T28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11" draw:text-style-name="P7" draw:layer="layout" svg:width="6.331cm" svg:height="1.281cm" svg:x="6.751cm" svg:y="8.802cm">
          <text:p text:style-name="P6"><text:span text:style-name="T28">رَأَيْتُ الْمُسْلِمَاتِ</text:span><text:span text:style-name="T28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12" draw:text-style-name="P7" draw:layer="layout" svg:width="7.138cm" svg:height="1.281cm" svg:x="5.542cm" svg:y="14.39cm">
          <text:p text:style-name="P6"><text:span text:style-name="T28">سَلَّمْتُ عَلَى الْمُسْلِمَاتِ</text:span><text:span text:style-name="T28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7" draw:layer="layout" svg:width="2.097cm" svg:height="1.794cm" svg:x="27.404cm" svg:y="15.226cm">
          <text:p text:style-name="P6"><text:span text:style-name="T10">التال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orded Sound" draw:style-name="gr114" xml:id="id3" draw:id="id3" draw:layer="layout" svg:width="1.128cm" svg:height="1.128cm" svg:x="3.091cm" svg:y="8.933cm" presentation:class="object" presentation:user-transformed="true">
          <draw:plugin xlink:href="ppt/media/media1.m4a" xlink:type="simple" xlink:show="embed" xlink:actuate="onLoad" draw:mime-type="audio/mp4">
            <draw:param draw:name="Loop" draw:value="false"/>
            <draw:param draw:name="Mute" draw:value="false"/>
            <draw:param draw:name="VolumeDB" draw:value="0"/>
          </draw:plugin>
          <draw:image xlink:href="Pictures/MediaPreview1.png" xlink:type="simple" xlink:show="embed" xlink:actuate="onLoad"/>
        </draw:frame>
        <draw:custom-shape draw:name="TextBox 24" draw:style-name="gr115" draw:text-style-name="P10" draw:layer="layout" svg:width="6.547cm" svg:height="5.385cm" svg:x="26.314cm" svg:y="7.665cm">
          <text:p text:style-name="P9"><text:span text:style-name="T29">جمع المؤنث السالم</text:span></text:p>
          <text:p text:style-name="P9"><text:span text:style-name="T3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19" draw:text-style-name="P15" draw:layer="layout" svg:width="3.096cm" svg:height="2.662cm" svg:x="28.995cm" svg:y="14.954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22.964s" smil:fill="hold" smil:targetElement="id3" anim:command="play"/>
                </anim:par>
              </anim:par>
            </anim:par>
          </anim:seq>
          <anim:audio smil:begin="indefinite" smil:end="stop-audio+0s" smil:fill="hold"/>
        </anim:pa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Picture 8" draw:style-name="gr1" draw:text-style-name="P1" draw:layer="layout" svg:width="31.728cm" svg:height="17.846cm" svg:x="0.665cm" svg:y="0.648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Oval 29" draw:style-name="gr75" draw:text-style-name="P30" draw:layer="layout" svg:width="0.406cm" svg:height="0.423cm" draw:transform="rotate (-2.60979083050712) translate (8.67cm 14.581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75" draw:text-style-name="P30" draw:layer="layout" svg:width="0.406cm" svg:height="0.423cm" draw:transform="rotate (-2.60979083050712) translate (8.67cm 9.304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75" draw:text-style-name="P30" draw:layer="layout" svg:width="0.406cm" svg:height="0.423cm" draw:transform="rotate (-2.60979083050712) translate (8.628cm 3.914cm)">
          <text:p/>
          <draw:enhanced-geometry draw:mirror-horizontal="false" draw:mirror-vertical="tru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116" draw:text-style-name="P7" draw:layer="layout" svg:width="7.654cm" svg:height="1.623cm" svg:x="12.822cm" svg:y="1.203cm">
          <text:p text:style-name="P6"><text:span text:style-name="T5">الذي يعرب باالحركات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42" draw:text-style-name="P1" draw:layer="layout" draw:type="line" svg:x1="26.704cm" svg:y1="9.524cm" svg:x2="22.825cm" svg:y2="9.524cm" svg:d="M26704 9524h-3879" svg:viewBox="0 0 3880 1">
          <text:p/>
        </draw:connector>
        <draw:connector draw:name="Straight Connector 15" draw:style-name="gr42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42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42" draw:text-style-name="P1" draw:layer="layout" draw:type="line" svg:x1="22.825cm" svg:y1="4.001cm" svg:x2="20.771cm" svg:y2="4.001cm" svg:d="M22825 4001h-2054" svg:viewBox="0 0 2055 1">
          <text:p/>
        </draw:connector>
        <draw:connector draw:name="Straight Connector 23" draw:style-name="gr23" draw:text-style-name="P1" draw:layer="layout" draw:type="line" svg:x1="22.825cm" svg:y1="9.524cm" svg:x2="20.285cm" svg:y2="9.524cm" svg:d="M22825 9524h-2540" svg:viewBox="0 0 2541 1">
          <text:p/>
        </draw:connector>
        <draw:connector draw:name="Straight Connector 26" draw:style-name="gr42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117" draw:text-style-name="P7" draw:layer="layout" svg:width="2.539cm" svg:height="1.623cm" svg:x="17.937cm" svg:y="3.438cm">
          <text:p text:style-name="P6"><text:span text:style-name="T25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18" draw:text-style-name="P7" draw:layer="layout" svg:width="3.026cm" svg:height="1.623cm" svg:x="17.519cm" svg:y="8.76cm">
          <text:p text:style-name="P6"><text:span text:style-name="T26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19" draw:text-style-name="P7" draw:layer="layout" svg:width="3.289cm" svg:height="1.623cm" svg:x="17.954cm" svg:y="14.359cm">
          <text:p text:style-name="P6"><text:span text:style-name="T27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39" draw:text-style-name="P1" draw:layer="layout" draw:type="line" svg:x1="17.205cm" svg:y1="4.001cm" svg:x2="15.348cm" svg:y2="4.001cm" svg:d="M17205 4001h-1857" svg:viewBox="0 0 1858 1">
          <text:p/>
        </draw:connector>
        <draw:connector draw:name="Straight Arrow Connector 35" draw:style-name="gr39" draw:text-style-name="P1" draw:layer="layout" draw:type="line" svg:x1="17.205cm" svg:y1="15.031cm" svg:x2="15.348cm" svg:y2="15.031cm" svg:d="M17205 15031h-1857" svg:viewBox="0 0 1858 1">
          <text:p/>
        </draw:connector>
        <draw:connector draw:name="Straight Arrow Connector 36" draw:style-name="gr39" draw:text-style-name="P1" draw:layer="layout" draw:type="line" svg:x1="17.205cm" svg:y1="9.524cm" svg:x2="15.348cm" svg:y2="9.524cm" svg:d="M17205 9524h-1857" svg:viewBox="0 0 1858 1">
          <text:p/>
        </draw:connector>
        <draw:custom-shape draw:name="TextBox 40" draw:style-name="gr120" draw:text-style-name="P7" draw:layer="layout" svg:width="3.688cm" svg:height="1.623cm" svg:x="12.224cm" svg:y="14.311cm">
          <text:p text:style-name="P6"><text:span text:style-name="T26">فتح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21" draw:text-style-name="P7" draw:layer="layout" svg:width="2.53cm" svg:height="2.991cm" svg:x="11.957cm" svg:y="8.897cm">
          <text:p text:style-name="P6"><text:span text:style-name="T26">فتحة</text:span></text:p>
          <text:p text:style-name="P6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22" draw:text-style-name="P7" draw:layer="layout" svg:width="2.53cm" svg:height="1.623cm" svg:x="12.074cm" svg:y="3.415cm">
          <text:p text:style-name="P6"><text:span text:style-name="T25">ضم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23" draw:text-style-name="P7" draw:layer="layout" svg:width="4.996cm" svg:height="1.281cm" svg:x="7.887cm" svg:y="3.56cm">
          <text:p text:style-name="P6"><text:span text:style-name="T28">جَاءَ أَحْمَد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24" draw:text-style-name="P7" draw:layer="layout" svg:width="4.68cm" svg:height="1.281cm" svg:x="7.95cm" svg:y="8.986cm">
          <text:p text:style-name="P6"><text:span text:style-name="T28">رَأَيْتُ أَحْمَد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25" draw:text-style-name="P7" draw:layer="layout" svg:width="7.138cm" svg:height="1.281cm" svg:x="7.933cm" svg:y="14.195cm">
          <text:p text:style-name="P6"><text:span text:style-name="T28">مَرَرْتُ بِأَحْمَد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6" draw:text-style-name="P7" draw:layer="layout" svg:width="2.262cm" svg:height="1.794cm" svg:x="27.538cm" svg:y="15.325cm">
          <text:p text:style-name="P6"><text:span text:style-name="T10">رجو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8" draw:style-name="gr3" draw:text-style-name="P3" draw:layer="layout" svg:width="4.209cm" svg:height="4.463cm" svg:x="27.379cm" svg:y="7.14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127" draw:text-style-name="P10" draw:layer="layout" svg:width="4.713cm" svg:height="5.385cm" svg:x="27.127cm" svg:y="7.734cm">
          <text:p text:style-name="P9"><text:span text:style-name="T29">إسم غير منصرف</text:span></text:p>
          <text:p text:style-name="P9"><text:span text:style-name="T3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19" draw:text-style-name="P15" draw:layer="layout" svg:width="4.981cm" svg:height="3.017cm" svg:x="27.09cm" svg:y="15.324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Picture 5" draw:style-name="gr1" draw:text-style-name="P1" draw:layer="layout" svg:width="32.066cm" svg:height="18.037cm" svg:x="0.9cm" svg:y="0.661cm">
          <draw:image xlink:href="Pictures/10000000000002E00000019EFC1FD9D1.jpg" xlink:type="simple" xlink:show="embed" xlink:actuate="onLoad" draw:mime-type="image/jpeg">
            <text:p/>
          </draw:image>
        </draw:frame>
        <draw:custom-shape draw:name="TextBox 3" draw:style-name="gr128" draw:text-style-name="P7" draw:layer="layout" svg:width="8.402cm" svg:height="1.623cm" svg:x="12.478cm" svg:y="0.937cm">
          <text:p text:style-name="P6"><text:span text:style-name="T5">الذي يعرب باالحرو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9" draw:text-style-name="P10" draw:layer="layout" svg:width="7.51cm" svg:height="1.965cm" svg:x="26.431cm" svg:y="8.634cm">
          <text:p text:style-name="P9"><text:span text:style-name="T30"><text:s/></text:span><text:span text:style-name="T30">الأسماء الخمس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102" draw:text-style-name="P1" draw:layer="layout" draw:type="line" svg:x1="26.704cm" svg:y1="9.524cm" svg:x2="23.303cm" svg:y2="9.524cm" svg:d="M26704 9524h-3401" svg:viewBox="0 0 3402 1">
          <text:p/>
        </draw:connector>
        <draw:connector draw:name="Straight Connector 15" draw:style-name="gr102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102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102" draw:text-style-name="P1" draw:layer="layout" draw:type="line" svg:x1="22.825cm" svg:y1="4.001cm" svg:x2="20.598cm" svg:y2="4.001cm" svg:d="M22825 4001h-2227" svg:viewBox="0 0 2228 1">
          <text:p/>
        </draw:connector>
        <draw:connector draw:name="Straight Connector 23" draw:style-name="gr102" draw:text-style-name="P1" draw:layer="layout" draw:type="line" svg:x1="22.825cm" svg:y1="9.524cm" svg:x2="20.598cm" svg:y2="9.524cm" svg:d="M22825 9524h-2227" svg:viewBox="0 0 2228 1">
          <text:p/>
        </draw:connector>
        <draw:connector draw:name="Straight Connector 26" draw:style-name="gr102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130" draw:text-style-name="P7" draw:layer="layout" svg:width="2.539cm" svg:height="1.623cm" svg:x="17.937cm" svg:y="3.438cm">
          <text:p text:style-name="P6"><text:span text:style-name="T25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1" draw:text-style-name="P7" draw:layer="layout" svg:width="3.026cm" svg:height="1.623cm" svg:x="17.519cm" svg:y="8.76cm">
          <text:p text:style-name="P6"><text:span text:style-name="T26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2" draw:text-style-name="P7" draw:layer="layout" svg:width="2.119cm" svg:height="1.623cm" svg:x="17.954cm" svg:y="14.359cm">
          <text:p text:style-name="P6"><text:span text:style-name="T27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06" draw:text-style-name="P1" draw:layer="layout" draw:type="line" svg:x1="17.205cm" svg:y1="4.001cm" svg:x2="15.192cm" svg:y2="4.001cm" svg:d="M17205 4001h-2013" svg:viewBox="0 0 2014 1">
          <text:p/>
        </draw:connector>
        <draw:connector draw:name="Straight Arrow Connector 35" draw:style-name="gr106" draw:text-style-name="P1" draw:layer="layout" draw:type="line" svg:x1="17.205cm" svg:y1="15.031cm" svg:x2="14.909cm" svg:y2="15.031cm" svg:d="M17205 15031h-2296" svg:viewBox="0 0 2297 1">
          <text:p/>
        </draw:connector>
        <draw:connector draw:name="Straight Arrow Connector 36" draw:style-name="gr106" draw:text-style-name="P1" draw:layer="layout" draw:type="line" svg:x1="17.205cm" svg:y1="9.524cm" svg:x2="15.192cm" svg:y2="9.524cm" svg:d="M17205 9524h-2013" svg:viewBox="0 0 2014 1">
          <text:p/>
        </draw:connector>
        <draw:custom-shape draw:name="TextBox 40" draw:style-name="gr133" draw:text-style-name="P7" draw:layer="layout" svg:width="2.295cm" svg:height="1.623cm" svg:x="12.224cm" svg:y="14.311cm">
          <text:p text:style-name="P6"><text:span text:style-name="T27">بالياء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34" draw:text-style-name="P7" draw:layer="layout" svg:width="3.277cm" svg:height="2.991cm" svg:x="11.707cm" svg:y="8.788cm">
          <text:p text:style-name="P6"><text:span text:style-name="T26">بالألف</text:span></text:p>
          <text:p text:style-name="P6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35" draw:text-style-name="P7" draw:layer="layout" svg:width="2.751cm" svg:height="1.623cm" svg:x="11.427cm" svg:y="3.137cm">
          <text:p text:style-name="P6"><text:span text:style-name="T25">بالواو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6" draw:text-style-name="P7" draw:layer="layout" svg:width="3.604cm" svg:height="1.281cm" svg:x="8.468cm" svg:y="3.438cm">
          <text:p text:style-name="P6"><text:span text:style-name="T28"><text:s/></text:span><text:span text:style-name="T28">جَاءَ أَبُ</text:span><text:span text:style-name="T31">و</text:span><text:span text:style-name="T28">ك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7" draw:text-style-name="P7" draw:layer="layout" svg:width="3.277cm" svg:height="1.281cm" svg:x="8.573cm" svg:y="8.931cm">
          <text:p text:style-name="P6"><text:span text:style-name="T28">رَأَيْتُ أَبَ</text:span><text:span text:style-name="T32">ا</text:span><text:span text:style-name="T28">ك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8" draw:text-style-name="P7" draw:layer="layout" svg:width="4.544cm" svg:height="1.281cm" svg:x="6.821cm" svg:y="14.482cm">
          <text:p text:style-name="P6"><text:span text:style-name="T28">سَلَّمْتُ عَلَى أَبِ</text:span><text:span text:style-name="T33">ي</text:span><text:span text:style-name="T28">ك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39" draw:text-style-name="P22" draw:layer="layout" svg:width="6.157cm" svg:height="2.649cm" svg:x="25.457cm" svg:y="14.906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140" draw:text-style-name="P7" draw:layer="layout" svg:width="2.097cm" svg:height="1.794cm" svg:x="27.404cm" svg:y="15.226cm">
          <text:p text:style-name="P6"><text:span text:style-name="T10">التال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Picture 5" draw:style-name="gr1" draw:text-style-name="P1" draw:layer="layout" svg:width="32.977cm" svg:height="18.549cm" svg:x="0cm" svg:y="0.456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TextBox 3" draw:style-name="gr141" draw:text-style-name="P7" draw:layer="layout" svg:width="7.253cm" svg:height="1.623cm" svg:x="12.255cm" svg:y="0.86cm">
          <text:p text:style-name="P6"><text:span text:style-name="T5">الذي يعرب باالحرو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10" draw:layer="layout" svg:width="7.51cm" svg:height="1.965cm" svg:x="24.951cm" svg:y="8.418cm">
          <text:p text:style-name="P9"><text:span text:style-name="T30">المثنى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143" draw:text-style-name="P1" draw:layer="layout" draw:type="line" svg:x1="26.704cm" svg:y1="9.524cm" svg:x2="23.255cm" svg:y2="9.524cm" svg:d="M26704 9524h-3449" svg:viewBox="0 0 3450 1">
          <text:p/>
        </draw:connector>
        <draw:connector draw:name="Straight Connector 15" draw:style-name="gr143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143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143" draw:text-style-name="P1" draw:layer="layout" draw:type="line" svg:x1="22.825cm" svg:y1="4.001cm" svg:x2="20.566cm" svg:y2="4.001cm" svg:d="M22825 4001h-2259" svg:viewBox="0 0 2260 1">
          <text:p/>
        </draw:connector>
        <draw:connector draw:name="Straight Connector 23" draw:style-name="gr143" draw:text-style-name="P1" draw:layer="layout" draw:type="line" svg:x1="22.825cm" svg:y1="9.524cm" svg:x2="20.566cm" svg:y2="9.524cm" svg:d="M22825 9524h-2259" svg:viewBox="0 0 2260 1">
          <text:p/>
        </draw:connector>
        <draw:connector draw:name="Straight Connector 26" draw:style-name="gr23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144" draw:text-style-name="P7" draw:layer="layout" svg:width="2.539cm" svg:height="1.623cm" svg:x="17.937cm" svg:y="3.438cm">
          <text:p text:style-name="P6"><text:span text:style-name="T27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5" draw:text-style-name="P7" draw:layer="layout" svg:width="3.026cm" svg:height="1.623cm" svg:x="17.519cm" svg:y="8.76cm">
          <text:p text:style-name="P6"><text:span text:style-name="T26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6" draw:text-style-name="P7" draw:layer="layout" svg:width="1.905cm" svg:height="1.623cm" svg:x="17.954cm" svg:y="14.359cm">
          <text:p text:style-name="P6"><text:span text:style-name="T27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47" draw:text-style-name="P1" draw:layer="layout" draw:type="line" svg:x1="17.205cm" svg:y1="4.001cm" svg:x2="15.164cm" svg:y2="4.001cm" svg:d="M17205 4001h-2041" svg:viewBox="0 0 2042 1">
          <text:p/>
        </draw:connector>
        <draw:connector draw:name="Straight Arrow Connector 35" draw:style-name="gr147" draw:text-style-name="P1" draw:layer="layout" draw:type="line" svg:x1="17.205cm" svg:y1="15.031cm" svg:x2="15.164cm" svg:y2="15.031cm" svg:d="M17205 15031h-2041" svg:viewBox="0 0 2042 1">
          <text:p/>
        </draw:connector>
        <draw:connector draw:name="Straight Arrow Connector 36" draw:style-name="gr147" draw:text-style-name="P1" draw:layer="layout" draw:type="line" svg:x1="17.205cm" svg:y1="9.524cm" svg:x2="15.164cm" svg:y2="9.524cm" svg:d="M17205 9524h-2041" svg:viewBox="0 0 2042 1">
          <text:p/>
        </draw:connector>
        <draw:custom-shape draw:name="TextBox 40" draw:style-name="gr148" draw:text-style-name="P7" draw:layer="layout" svg:width="2.295cm" svg:height="1.623cm" svg:x="12.224cm" svg:y="14.311cm">
          <text:p text:style-name="P6"><text:span text:style-name="T27">بالياء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49" draw:text-style-name="P7" draw:layer="layout" svg:width="3.277cm" svg:height="2.991cm" svg:x="12.14cm" svg:y="8.876cm">
          <text:p text:style-name="P6"><text:span text:style-name="T27">بالياء</text:span></text:p>
          <text:p text:style-name="P6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50" draw:text-style-name="P7" draw:layer="layout" svg:width="2.759cm" svg:height="1.623cm" svg:x="11.761cm" svg:y="3.242cm">
          <text:p text:style-name="P6"><text:span text:style-name="T26">بالأل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51" draw:text-style-name="P7" draw:layer="layout" svg:width="4.996cm" svg:height="1.281cm" svg:x="8.337cm" svg:y="3.433cm">
          <text:p text:style-name="P6"><text:span text:style-name="T12"><text:s/></text:span><text:span text:style-name="T12">جَاءَ الطَّالِب</text:span><text:span text:style-name="T34">َا</text:span><text:span text:style-name="T12">نِ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52" draw:text-style-name="P7" draw:layer="layout" svg:width="3.63cm" svg:height="1.281cm" svg:x="8.4cm" svg:y="9.09cm">
          <text:p text:style-name="P6"><text:span text:style-name="T12">رَأَيْتُ الطَّالِبَ</text:span><text:span text:style-name="T35">يْ</text:span><text:span text:style-name="T12">ن</text:span><text:span text:style-name="T35">ِ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53" draw:text-style-name="P7" draw:layer="layout" svg:width="5.783cm" svg:height="1.281cm" svg:x="7.978cm" svg:y="14.39cm">
          <text:p text:style-name="P6"><text:span text:style-name="T12">مَرَرْتُ بِالطَّالِبَ</text:span><text:span text:style-name="T35">يْن</text:span><text:span text:style-name="T12">ِ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54" draw:text-style-name="P22" draw:layer="layout" svg:width="6.157cm" svg:height="2.649cm" svg:x="25.457cm" svg:y="14.906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155" draw:text-style-name="P7" draw:layer="layout" svg:width="2.097cm" svg:height="1.794cm" svg:x="27.404cm" svg:y="15.226cm">
          <text:p text:style-name="P6"><text:span text:style-name="T10">التالي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Picture 5" draw:style-name="gr1" draw:text-style-name="P1" draw:layer="layout" svg:width="31.399cm" svg:height="20.343cm" svg:x="1.233cm" svg:y="0.418cm">
          <draw:image xlink:href="Pictures/10000000000002DF000001EA8085CB25.jpg" xlink:type="simple" xlink:show="embed" xlink:actuate="onLoad" draw:mime-type="image/jpeg">
            <text:p/>
          </draw:image>
        </draw:frame>
        <draw:custom-shape draw:name="Oval 8" draw:style-name="gr3" draw:text-style-name="P3" draw:layer="layout" svg:width="2.499cm" svg:height="2.045cm" svg:x="2.232cm" svg:y="8.54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156" draw:text-style-name="P7" draw:layer="layout" svg:width="6.925cm" svg:height="1.623cm" svg:x="12.074cm" svg:y="0.975cm">
          <text:p text:style-name="P6"><text:span text:style-name="T5">الذي يعرب باالحرو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3" draw:style-name="gr102" draw:text-style-name="P1" draw:layer="layout" draw:type="line" svg:x1="26.704cm" svg:y1="9.524cm" svg:x2="23.28cm" svg:y2="9.524cm" svg:d="M26704 9524h-3424" svg:viewBox="0 0 3425 1">
          <text:p/>
        </draw:connector>
        <draw:connector draw:name="Straight Connector 15" draw:style-name="gr102" draw:text-style-name="P1" draw:layer="layout" draw:type="line" svg:x1="22.825cm" svg:y1="9.524cm" svg:x2="22.825cm" svg:y2="4.001cm" svg:d="M22825 9524v-5523" svg:viewBox="0 0 1 5524">
          <text:p/>
        </draw:connector>
        <draw:connector draw:name="Straight Connector 17" draw:style-name="gr102" draw:text-style-name="P1" draw:layer="layout" draw:type="line" svg:x1="22.825cm" svg:y1="9.572cm" svg:x2="22.825cm" svg:y2="15.031cm" svg:d="M22825 9572v5459" svg:viewBox="0 0 1 5460">
          <text:p/>
        </draw:connector>
        <draw:connector draw:name="Straight Connector 21" draw:style-name="gr102" draw:text-style-name="P1" draw:layer="layout" draw:type="line" svg:x1="22.825cm" svg:y1="4.001cm" svg:x2="20.583cm" svg:y2="4.001cm" svg:d="M22825 4001h-2242" svg:viewBox="0 0 2243 1">
          <text:p/>
        </draw:connector>
        <draw:connector draw:name="Straight Connector 23" draw:style-name="gr102" draw:text-style-name="P1" draw:layer="layout" draw:type="line" svg:x1="22.825cm" svg:y1="9.524cm" svg:x2="20.285cm" svg:y2="9.524cm" svg:d="M22825 9524h-2540" svg:viewBox="0 0 2541 1">
          <text:p/>
        </draw:connector>
        <draw:connector draw:name="Straight Connector 26" draw:style-name="gr102" draw:text-style-name="P1" draw:layer="layout" draw:type="line" svg:x1="22.825cm" svg:y1="15.031cm" svg:x2="20.285cm" svg:y2="15.031cm" svg:d="M22825 15031h-2540" svg:viewBox="0 0 2541 1">
          <text:p/>
        </draw:connector>
        <draw:custom-shape draw:name="TextBox 28" draw:style-name="gr157" draw:text-style-name="P7" draw:layer="layout" svg:width="2.539cm" svg:height="1.623cm" svg:x="17.937cm" svg:y="3.438cm">
          <text:p text:style-name="P6"><text:span text:style-name="T25">الرف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58" draw:text-style-name="P7" draw:layer="layout" svg:width="3.026cm" svg:height="1.623cm" svg:x="17.519cm" svg:y="8.76cm">
          <text:p text:style-name="P6"><text:span text:style-name="T26">النصب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59" draw:text-style-name="P7" draw:layer="layout" svg:width="2.016cm" svg:height="1.623cm" svg:x="17.954cm" svg:y="14.359cm">
          <text:p text:style-name="P6"><text:span text:style-name="T27">الجر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06" draw:text-style-name="P1" draw:layer="layout" draw:type="line" svg:x1="17.205cm" svg:y1="4.001cm" svg:x2="15.178cm" svg:y2="4.001cm" svg:d="M17205 4001h-2027" svg:viewBox="0 0 2028 1">
          <text:p/>
        </draw:connector>
        <draw:connector draw:name="Straight Arrow Connector 35" draw:style-name="gr106" draw:text-style-name="P1" draw:layer="layout" draw:type="line" svg:x1="17.205cm" svg:y1="15.031cm" svg:x2="14.909cm" svg:y2="15.031cm" svg:d="M17205 15031h-2296" svg:viewBox="0 0 2297 1">
          <text:p/>
        </draw:connector>
        <draw:connector draw:name="Straight Arrow Connector 36" draw:style-name="gr106" draw:text-style-name="P1" draw:layer="layout" draw:type="line" svg:x1="17.205cm" svg:y1="9.524cm" svg:x2="15.178cm" svg:y2="9.524cm" svg:d="M17205 9524h-2027" svg:viewBox="0 0 2028 1">
          <text:p/>
        </draw:connector>
        <draw:custom-shape draw:name="TextBox 40" draw:style-name="gr160" draw:text-style-name="P7" draw:layer="layout" svg:width="2.295cm" svg:height="1.623cm" svg:x="12.224cm" svg:y="14.311cm">
          <text:p text:style-name="P6"><text:span text:style-name="T27">بالياء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61" draw:text-style-name="P7" draw:layer="layout" svg:width="3.277cm" svg:height="2.991cm" svg:x="12.14cm" svg:y="8.876cm">
          <text:p text:style-name="P6"><text:span text:style-name="T27">بالياء</text:span></text:p>
          <text:p text:style-name="P6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62" draw:text-style-name="P7" draw:layer="layout" svg:width="2.295cm" svg:height="1.623cm" svg:x="11.761cm" svg:y="3.242cm">
          <text:p text:style-name="P6"><text:span text:style-name="T25">بالواو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63" draw:text-style-name="P7" draw:layer="layout" svg:width="4.996cm" svg:height="1.281cm" svg:x="7.717cm" svg:y="3.532cm">
          <text:p text:style-name="P6"><text:span text:style-name="T28"><text:s/></text:span><text:span text:style-name="T28">جَاءَ الْمُسْلِمُ</text:span><text:span text:style-name="T36">و</text:span><text:span text:style-name="T28">ن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64" draw:text-style-name="P7" draw:layer="layout" svg:width="4.734cm" svg:height="1.281cm" svg:x="7.284cm" svg:y="9.307cm">
          <text:p text:style-name="P6"><text:span text:style-name="T28">رَأَيْتُ الْمُسْلِمِ</text:span><text:span text:style-name="T37">ي</text:span><text:span text:style-name="T38">ن</text:span><text:span text:style-name="T28">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65" draw:text-style-name="P7" draw:layer="layout" svg:width="5.783cm" svg:height="1.281cm" svg:x="6.44cm" svg:y="14.596cm">
          <text:p text:style-name="P6"><text:span text:style-name="T28">سَلَّمْتُ عَلَى الْمُسْلِمِ</text:span><text:span text:style-name="T39">ي</text:span><text:span text:style-name="T28">ن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66" draw:text-style-name="P22" draw:layer="layout" svg:width="6.157cm" svg:height="2.649cm" svg:x="25.59cm" svg:y="15.004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9"><text:span text:style-name="T9"><text:tab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167" draw:text-style-name="P7" draw:layer="layout" svg:width="2.262cm" svg:height="1.794cm" svg:x="27.538cm" svg:y="15.325cm">
          <text:p text:style-name="P6"><text:span text:style-name="T10">رجو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orded Sound" draw:style-name="gr114" xml:id="id4" draw:id="id4" draw:layer="layout" svg:width="1.128cm" svg:height="1.128cm" svg:x="3.015cm" svg:y="9.008cm" presentation:class="object" presentation:user-transformed="true">
          <draw:plugin xlink:href="ppt/media/media2.m4a" xlink:type="simple" xlink:show="embed" xlink:actuate="onLoad" draw:mime-type="audio/mp4">
            <draw:param draw:name="Loop" draw:value="false"/>
            <draw:param draw:name="Mute" draw:value="false"/>
            <draw:param draw:name="VolumeDB" draw:value="0"/>
          </draw:plugin>
          <draw:image xlink:href="Pictures/MediaPreview2.png" xlink:type="simple" xlink:show="embed" xlink:actuate="onLoad"/>
        </draw:frame>
        <draw:custom-shape draw:name="Rectangle: Rounded Corners 9" draw:style-name="gr3" draw:text-style-name="P3" draw:layer="layout" svg:width="4.44cm" svg:height="4.501cm" svg:x="27.341cm" svg:y="6.885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168" draw:text-style-name="P10" draw:layer="layout" svg:width="6.155cm" svg:height="3.675cm" svg:x="26.477cm" svg:y="7.469cm">
          <text:p text:style-name="P9"><text:span text:style-name="T30">جمع المذكر السال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  <anim:audio smil:begin="indefinite" smil:end="stop-audio+0s" smil:fill="hold"/>
        </anim:par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ank">
        <draw:frame draw:name="Picture 4" draw:style-name="gr1" draw:text-style-name="P1" draw:layer="layout" svg:width="32.743cm" svg:height="17.712cm" svg:x="0.561cm" svg:y="0.112cm">
          <draw:image xlink:href="Pictures/10000000000002DF0000019ADE8A7756.jpg" xlink:type="simple" xlink:show="embed" xlink:actuate="onLoad" draw:mime-type="image/jpeg">
            <text:p/>
          </draw:image>
        </draw:frame>
        <draw:custom-shape draw:name="TextBox 9" draw:style-name="gr169" draw:text-style-name="P7" draw:layer="layout" svg:width="3.006cm" svg:height="1.025cm" svg:x="26.221cm" svg:y="9.811cm">
          <text:p text:style-name="P6"><text:span text:style-name="T2">EVALUAS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70" draw:text-style-name="P31" draw:layer="layout" svg:width="0.512cm" svg:height="1.025cm" svg:x="15.042cm" svg:y="14.9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71" draw:text-style-name="P7" draw:layer="layout" svg:width="2.605cm" svg:height="1.025cm" svg:x="15.31cm" svg:y="6.273cm">
          <text:p text:style-name="P6"><text:span text:style-name="T2">TUJU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72" draw:text-style-name="P7" draw:layer="layout" svg:width="3.237cm" svg:height="1.025cm" svg:x="4.639cm" svg:y="10.324cm">
          <text:p text:style-name="P6"><text:span text:style-name="T2">PETUNJU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3" draw:text-style-name="P10" draw:layer="layout" svg:width="16.921cm" svg:height="11.028cm" svg:x="7.877cm" svg:y="2.737cm">
          <text:p text:style-name="P9"><text:span text:style-name="T40">Tujuan</text:span><text:span text:style-name="T41"> </text:span><text:span text:style-name="T40">Pengembangan</text:span></text:p>
          <text:p text:style-name="P9"><text:span text:style-name="T40"/></text:p>
          <text:p text:style-name="P9"><text:span text:style-name="T40">Tujuan Umum</text:span></text:p>
          <text:p text:style-name="P6"><text:span text:style-name="T40"/></text:p>
          <text:p text:style-name="P6"><text:span text:style-name="T42">Menghasilkan media pembelajaran PowerPoint Interaktif berbasis Mind Mapping dan Nyanyian pada materi tanda-tanda i'rab.</text:span></text:p>
          <text:p text:style-name="P6"><text:span text:style-name="T42"/></text:p>
          <text:p text:style-name="P9"><text:span text:style-name="T40">Tujuan Khusus</text:span></text:p>
          <text:p text:style-name="P6"><text:span text:style-name="T40"/></text:p>
          <text:list text:style-name="L9">
            <text:list-item>
              <text:p text:style-name="P6"><text:span text:style-name="T42">Mempermudah memahami konsep. </text:span></text:p>
            </text:list-item>
            <text:list-item>
              <text:p text:style-name="P6"><text:span text:style-name="T42">Membantu menghafal. </text:span></text:p>
            </text:list-item>
            <text:list-item>
              <text:p text:style-name="P6"><text:span text:style-name="T42">Meningkatkan motivasi belajar. </text:span></text:p>
            </text:list-item>
            <text:list-item>
              <text:p text:style-name="P6"><text:span text:style-name="T42">Menyajikan pembelajaran yang interaktif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ank">
        <draw:frame draw:name="Picture 5" draw:style-name="gr1" draw:text-style-name="P1" draw:layer="layout" svg:width="32.977cm" svg:height="18.549cm" svg:x="0cm" svg:y="0.5cm">
          <draw:image xlink:href="Pictures/10000000000002E00000019E299B2CC7.jpg" xlink:type="simple" xlink:show="embed" xlink:actuate="onLoad" draw:mime-type="image/jpeg">
            <text:p/>
          </draw:image>
        </draw:frame>
        <draw:custom-shape draw:name="TextBox 2" draw:style-name="gr174" draw:text-style-name="P7" draw:layer="layout" svg:width="19.162cm" svg:height="8.719cm" svg:x="4.636cm" svg:y="4.754cm">
          <text:p text:style-name="P6"><text:span text:style-name="T43">Tujuan Pengembangan</text:span></text:p>
          <text:p text:style-name="P6"><text:span text:style-name="T43">Tujuan Umum</text:span></text:p>
          <text:p text:style-name="P6"><text:span text:style-name="T43"/></text:p>
          <text:p text:style-name="P6"><text:span text:style-name="T44">Menghasilkan media pembelajaran PowerPoint Interaktif berbasis Mind Mapping dan Nyanyian pada materi tanda-tanda i'rab.</text:span></text:p>
          <text:p text:style-name="P6"><text:span text:style-name="T44"/></text:p>
          <text:p text:style-name="P6"><text:span text:style-name="T43">Tujuan Khusus</text:span></text:p>
          <text:list text:style-name="L10">
            <text:list-item>
              <text:p text:style-name="P6"><text:span text:style-name="T44">Mempermudah memahami konsep. </text:span></text:p>
            </text:list-item>
            <text:list-item>
              <text:p text:style-name="P6"><text:span text:style-name="T44">Membantu menghafal. </text:span></text:p>
            </text:list-item>
            <text:list-item>
              <text:p text:style-name="P6"><text:span text:style-name="T44">Meningkatkan motivasi belajar. </text:span></text:p>
            </text:list-item>
            <text:list-item>
              <text:p text:style-name="P6"><text:span text:style-name="T44">Menyajikan pembelajaran yang interaktif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75" draw:text-style-name="P22" draw:layer="layout" svg:width="4.07cm" svg:height="3.078cm" svg:x="28.907cm" svg:y="15.47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9"><text:span text:style-name="T45">رجوع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custom-shape draw:name="Oval 3" draw:style-name="gr176" draw:text-style-name="P22" draw:layer="layout" svg:width="4.07cm" svg:height="3.078cm" svg:x="28.338cm" svg:y="15.53cm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9"><text:span text:style-name="T47">التالي</text:span></text:p>
          <text:p text:style-name="P9"><text:span text:style-name="T48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4" draw:style-name="gr177" draw:text-style-name="P32" draw:layer="layout" svg:width="15.97cm" svg:height="1.878cm" svg:x="9.18cm" svg:y="2.818cm">
          <text:p text:style-name="P9"><text:span text:style-name="T49">ما تعريف الكلام عند ابن آجرو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178" draw:text-style-name="P32" draw:layer="layout" svg:width="15.97cm" svg:height="1.878cm" svg:x="17.246cm" svg:y="11.574cm">
          <text:p text:style-name="P9"><text:span text:style-name="T44">D. </text:span><text:span text:style-name="T50">مجموعة من الحروف التي لا معنى لها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179" draw:text-style-name="P32" draw:layer="layout" svg:width="15.97cm" svg:height="1.878cm" svg:x="17.246cm" svg:y="7.617cm">
          <text:p text:style-name="P9"><text:span text:style-name="T44">B. </text:span><text:span text:style-name="T50">اللفظ المركب المفيد بالوضع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180" draw:text-style-name="P32" draw:layer="layout" svg:width="15.97cm" svg:height="1.878cm" svg:x="0.963cm" svg:y="7.646cm">
          <text:p text:style-name="P9"><text:span text:style-name="T44">A. </text:span><text:span text:style-name="T50">اللفظ الذي يتكون من كلمة واحد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181" draw:text-style-name="P32" draw:layer="layout" svg:width="15.97cm" svg:height="1.878cm" svg:x="0.963cm" svg:y="11.591cm">
          <text:p text:style-name="P9"><text:span text:style-name="T44">C. </text:span><text:span text:style-name="T50">كل صوت يخرج من الف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path draw:style-name="gr182" draw:text-style-name="P33" draw:layer="layout" svg:width="3.228cm" svg:height="2.567cm" draw:transform="rotate (2.8614673086447) translate (22.3510904897623cm 10.3261191948497cm)" svg:viewBox="0 0 3229 2568" svg:d="M1058 2432c758-237 2058-450 2167-1422 65-580-632-1143-1216-982-522 143-1025 138-1553 313-791 262-328 839-255 1272 82 487 476 1065 1068 937l258-30">
          <text:p/>
        </draw:path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Oval 3" draw:style-name="gr183" draw:text-style-name="P22" draw:layer="layout" svg:width="4.07cm" svg:height="3.078cm" svg:x="28.338cm" svg:y="15.53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9"><text:span text:style-name="T47">التالي</text:span></text:p>
          <text:p text:style-name="P9"><text:span text:style-name="T48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4" draw:style-name="gr184" draw:text-style-name="P32" draw:layer="layout" svg:width="15.97cm" svg:height="1.878cm" svg:x="9.18cm" svg:y="2.818cm">
          <text:p text:style-name="P9"><text:span text:style-name="T49">أيُّ مما يأتي يُعَدُّ كلامًا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185" draw:text-style-name="P32" draw:layer="layout" svg:width="15.97cm" svg:height="1.878cm" svg:x="17.246cm" svg:y="11.574cm">
          <text:p text:style-name="P9"><text:span text:style-name="T44">D. </text:span><text:span text:style-name="T50">في البيت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186" draw:text-style-name="P32" draw:layer="layout" svg:width="15.97cm" svg:height="1.878cm" svg:x="17.246cm" svg:y="7.617cm">
          <text:p text:style-name="P9"><text:span text:style-name="T44">B. </text:span><text:span text:style-name="T50">إنْ جاء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187" draw:text-style-name="P32" draw:layer="layout" svg:width="15.97cm" svg:height="1.878cm" svg:x="0.963cm" svg:y="7.617cm">
          <text:p text:style-name="P9"><text:span text:style-name="T44">A. </text:span><text:span text:style-name="T50">زيدٌ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188" draw:text-style-name="P32" draw:layer="layout" svg:width="15.97cm" svg:height="1.878cm" svg:x="0.963cm" svg:y="11.591cm">
          <text:p text:style-name="P9"><text:span text:style-name="T44">C. </text:span><text:span text:style-name="T50">جاءَ زيدٌ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path draw:style-name="gr182" draw:text-style-name="P33" draw:layer="layout" svg:width="4.539cm" svg:height="3.298cm" svg:x="6.399cm" svg:y="10.796cm" svg:viewBox="0 0 4540 3299" svg:d="M1709 86c-495 235-1772 157-1707 1024 35 467-64 1008 341 1366 429 378 972 618 1537 725 552 105 1141 185 1707-85 535-255 1042-752 939-1366-108-643-678-1120-1281-1195-639-79-1275-201-1877-427l-299-128">
          <text:p/>
        </draw:path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Oval 3" draw:style-name="gr189" draw:text-style-name="P22" draw:layer="layout" svg:width="4.07cm" svg:height="3.078cm" svg:x="28.338cm" svg:y="15.53cm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9"><text:span text:style-name="T51">التالي</text:span></text:p>
          <text:p text:style-name="P9"><text:span text:style-name="T52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4" draw:style-name="gr190" draw:text-style-name="P32" draw:layer="layout" svg:width="15.97cm" svg:height="1.878cm" svg:x="9.18cm" svg:y="2.818cm">
          <text:p text:style-name="P9"><text:span text:style-name="T49">يُّ مما يأتي ليس كلامًا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191" draw:text-style-name="P32" draw:layer="layout" svg:width="15.97cm" svg:height="1.878cm" svg:x="17.246cm" svg:y="11.574cm">
          <text:p text:style-name="P9"><text:span text:style-name="T44">D. </text:span><text:span text:style-name="T50">ذهبَ الطالبُ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192" draw:text-style-name="P32" draw:layer="layout" svg:width="15.97cm" svg:height="1.878cm" svg:x="17.246cm" svg:y="7.617cm">
          <text:p text:style-name="P9"><text:span text:style-name="T44">B. </text:span><text:span text:style-name="T50">محمدٌ حاضرٌ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193" draw:text-style-name="P32" draw:layer="layout" svg:width="15.97cm" svg:height="1.878cm" svg:x="0.963cm" svg:y="7.617cm">
          <text:p text:style-name="P9"><text:span text:style-name="T44">A. </text:span><text:span text:style-name="T50">قامَ زيدٌ</text:span><text:span text:style-name="T53"><text:line-break/></text:span><text:span text:style-name="T5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194" draw:text-style-name="P32" draw:layer="layout" svg:width="15.97cm" svg:height="1.878cm" svg:x="0.963cm" svg:y="11.591cm">
          <text:p text:style-name="P9"><text:span text:style-name="T44">C. </text:span><text:span text:style-name="T50">إنْ جاء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path draw:style-name="gr182" draw:text-style-name="P33" draw:layer="layout" svg:width="4.871cm" svg:height="3.609cm" svg:x="6.12cm" svg:y="10.882cm" svg:viewBox="0 0 4872 3610" svg:d="M2201 341c-795-448-1685 55-2005 811-186 440-344 1043 42 1366 427 357 990 539 1537 640 665 123 1383 771 2005 256 491-407 796-995 1025-1579 441-1124-1414-1303-1963-1707l-555-128-470 256-42 43">
          <text:p/>
        </draw:path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: Rounded Corners 4" draw:style-name="gr195" draw:text-style-name="P32" draw:layer="layout" svg:width="15.97cm" svg:height="1.878cm" svg:x="9.18cm" svg:y="2.818cm">
          <text:p text:style-name="P9"><text:span text:style-name="T49">أيُّ مما يأتي يُعَدُّ كلامًا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196" draw:text-style-name="P32" draw:layer="layout" svg:width="15.97cm" svg:height="1.878cm" svg:x="17.246cm" svg:y="11.574cm">
          <text:p text:style-name="P9"><text:span text:style-name="T44">D. </text:span><text:span text:style-name="T50">المبتدأ، والخبر، والفاعل، والمفعول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197" draw:text-style-name="P32" draw:layer="layout" svg:width="15.97cm" svg:height="1.878cm" svg:x="17.246cm" svg:y="7.617cm">
          <text:p text:style-name="P9"><text:span text:style-name="T44">B. </text:span><text:span text:style-name="T50">الاسم، والفعل، والحرف، والكل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198" draw:text-style-name="P32" draw:layer="layout" svg:width="15.97cm" svg:height="1.878cm" svg:x="0.963cm" svg:y="7.617cm">
          <text:p text:style-name="P9"><text:span text:style-name="T44">A. </text:span><text:span text:style-name="T50">اللفظ، والمركب، والمفيد، والوضع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199" draw:text-style-name="P32" draw:layer="layout" svg:width="15.97cm" svg:height="1.878cm" svg:x="0.963cm" svg:y="11.591cm">
          <text:p text:style-name="P9"><text:span text:style-name="T44">C. </text:span><text:span text:style-name="T50">الرفع، والنصب، والجر، والجز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00" draw:text-style-name="P22" draw:layer="layout" svg:width="3.687cm" svg:height="2.226cm" svg:x="28.705cm" svg:y="16.458cm">
          <office:event-listeners>
            <presentation:event-listener script:event-name="dom:click" presentation:action="show" xlink:href="#page39" xlink:type="simple" xlink:show="embed" xlink:actuate="onRequest"/>
          </office:event-listeners>
          <text:p text:style-name="P9"><text:span text:style-name="T54">رجوع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Oval 3" draw:style-name="gr201" draw:text-style-name="P22" draw:layer="layout" svg:width="4.07cm" svg:height="3.078cm" svg:x="28.338cm" svg:y="15.53cm">
          <office:event-listeners>
            <presentation:event-listener script:event-name="dom:click" presentation:action="show" xlink:href="#page22" xlink:type="simple" xlink:show="embed" xlink:actuate="onRequest"/>
          </office:event-listeners>
          <text:p text:style-name="P9"><text:span text:style-name="T47">التالي</text:span></text:p>
          <text:p text:style-name="P9"><text:span text:style-name="T55"><text:a xlink:href="#Slide 22" xlink:type="simple">Slide 22</text:a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4" draw:style-name="gr202" draw:text-style-name="P32" draw:layer="layout" svg:width="15.97cm" svg:height="1.878cm" svg:x="9.18cm" svg:y="2.818cm">
          <text:p text:style-name="P9"><text:span text:style-name="T49">ما تعريف الإعراب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03" draw:text-style-name="P32" draw:layer="layout" svg:width="15.97cm" svg:height="1.878cm" svg:x="17.246cm" svg:y="11.574cm">
          <text:p text:style-name="P9"><text:span text:style-name="T49">تغيير معنى الجمل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04" draw:text-style-name="P32" draw:layer="layout" svg:width="15.97cm" svg:height="1.878cm" svg:x="17.246cm" svg:y="7.617cm">
          <text:p text:style-name="P9"><text:span text:style-name="T44">B. </text:span><text:span text:style-name="T50">تغيير أواخر الكلم لاختلاف العوامل الداخلة عليها لفظًا أو تقديرًا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05" draw:text-style-name="P32" draw:layer="layout" svg:width="15.97cm" svg:height="1.878cm" svg:x="0.963cm" svg:y="7.617cm">
          <text:p text:style-name="P9"><text:span text:style-name="T44">A. </text:span><text:span text:style-name="T50">تغيير أوائل الكل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06" draw:text-style-name="P32" draw:layer="layout" svg:width="15.97cm" svg:height="1.878cm" svg:x="0.963cm" svg:y="11.591cm">
          <text:p text:style-name="P9"><text:span text:style-name="T44">C. </text:span><text:span text:style-name="T50">تغيير شكل الحروف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Rectangle: Rounded Corners 4" draw:style-name="gr207" draw:text-style-name="P32" draw:layer="layout" svg:width="15.97cm" svg:height="1.878cm" svg:x="9.18cm" svg:y="2.818cm">
          <text:p text:style-name="P9"><text:span text:style-name="T49">كم أقسام الإعراب؟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08" draw:text-style-name="P32" draw:layer="layout" svg:width="15.97cm" svg:height="1.878cm" svg:x="17.246cm" svg:y="11.574cm">
          <text:p text:style-name="P9"><text:span text:style-name="T44">D. </text:span><text:span text:style-name="T50">خمسة أقس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09" draw:text-style-name="P32" draw:layer="layout" svg:width="15.97cm" svg:height="1.878cm" svg:x="17.246cm" svg:y="7.617cm">
          <text:p text:style-name="P9"><text:span text:style-name="T44">B. </text:span><text:span text:style-name="T50">ثلاثة أقس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10" draw:text-style-name="P32" draw:layer="layout" svg:width="15.97cm" svg:height="1.878cm" svg:x="0.963cm" svg:y="7.617cm">
          <text:p text:style-name="P9"><text:span text:style-name="T44">A. </text:span><text:span text:style-name="T50">قسما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11" draw:text-style-name="P32" draw:layer="layout" svg:width="15.97cm" svg:height="1.878cm" svg:x="0.963cm" svg:y="11.591cm">
          <text:p text:style-name="P9"><text:span text:style-name="T44">C. </text:span><text:span text:style-name="T50">أربعة أقس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12" draw:text-style-name="P22" draw:layer="layout" svg:width="3.235cm" svg:height="1.878cm" svg:x="29.227cm" svg:y="16.841cm">
          <office:event-listeners>
            <presentation:event-listener script:event-name="dom:click" presentation:action="show" xlink:href="#page23" xlink:type="simple" xlink:show="embed" xlink:actuate="onRequest"/>
          </office:event-listeners>
          <text:p text:style-name="P9"><text:span text:style-name="T4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lank">
        <draw:custom-shape draw:name="Rectangle: Rounded Corners 4" draw:style-name="gr213" draw:text-style-name="P32" draw:layer="layout" svg:width="15.97cm" svg:height="1.878cm" svg:x="9.18cm" svg:y="2.818cm">
          <text:p text:style-name="P9"><text:span text:style-name="T49">ما أقسام الإعراب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14" draw:text-style-name="P32" draw:layer="layout" svg:width="15.97cm" svg:height="1.878cm" svg:x="17.246cm" svg:y="11.574cm">
          <text:p text:style-name="P9"><text:span text:style-name="T49">المبتدأ، والخبر، والفاعل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15" draw:text-style-name="P32" draw:layer="layout" svg:width="15.97cm" svg:height="1.878cm" svg:x="17.246cm" svg:y="7.617cm">
          <text:p text:style-name="P9"><text:span text:style-name="T44">B. </text:span><text:span text:style-name="T50">الرفع، والنصب، والجر، والجز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16" draw:text-style-name="P32" draw:layer="layout" svg:width="15.97cm" svg:height="1.878cm" svg:x="0.963cm" svg:y="7.617cm">
          <text:p text:style-name="P9"><text:span text:style-name="T44">A. </text:span><text:span text:style-name="T50">الاسم، والفعل، والحرف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17" draw:text-style-name="P32" draw:layer="layout" svg:width="15.97cm" svg:height="1.878cm" svg:x="0.963cm" svg:y="11.591cm">
          <text:p text:style-name="P9"><text:span text:style-name="T44">C. </text:span><text:span text:style-name="T50">المفرد، والمثنى، والجمع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18" draw:text-style-name="P22" draw:layer="layout" svg:width="3.328cm" svg:height="2.452cm" svg:x="29.888cm" svg:y="16.597cm">
          <office:event-listeners>
            <presentation:event-listener script:event-name="dom:click" presentation:action="show" xlink:href="#page24" xlink:type="simple" xlink:show="embed" xlink:actuate="onRequest"/>
          </office:event-listeners>
          <text:p text:style-name="P9"><text:span text:style-name="T4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lank">
        <draw:custom-shape draw:name="Rectangle: Rounded Corners 4" draw:style-name="gr219" draw:text-style-name="P32" draw:layer="layout" svg:width="17.148cm" svg:height="2.703cm" svg:x="9.18cm" svg:y="2.818cm">
          <text:p text:style-name="P9"><text:span text:style-name="T49">ما إعراب كلمة </text:span><text:span text:style-name="T56">«زيدًا»</text:span><text:span text:style-name="T49"> في الجملة الآتية؟</text:span></text:p>
          <text:p text:style-name="P9"><text:span text:style-name="T49">رأيتُ زيدًا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20" draw:text-style-name="P32" draw:layer="layout" svg:width="15.97cm" svg:height="1.878cm" svg:x="17.246cm" svg:y="11.574cm">
          <text:p text:style-name="P9"><text:span text:style-name="T44">D. </text:span><text:span text:style-name="T50">الجز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21" draw:text-style-name="P32" draw:layer="layout" svg:width="15.97cm" svg:height="1.878cm" svg:x="17.246cm" svg:y="7.617cm">
          <text:p text:style-name="P9"><text:span text:style-name="T44">B. </text:span><text:span text:style-name="T50">النصب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22" draw:text-style-name="P32" draw:layer="layout" svg:width="15.97cm" svg:height="1.878cm" svg:x="0.963cm" svg:y="7.617cm">
          <text:p text:style-name="P9"><text:span text:style-name="T44">A. </text:span><text:span text:style-name="T50">الرفع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23" draw:text-style-name="P32" draw:layer="layout" svg:width="15.97cm" svg:height="1.878cm" svg:x="0.963cm" svg:y="11.591cm">
          <text:p text:style-name="P9"><text:span text:style-name="T44">C. </text:span><text:span text:style-name="T50">الجر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026cm" svg:height="2.226cm" svg:x="29.088cm" svg:y="16.04cm">
          <office:event-listeners>
            <presentation:event-listener script:event-name="dom:click" presentation:action="show" xlink:href="#page39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lank">
        <draw:custom-shape draw:name="Rectangle: Rounded Corners 4" draw:style-name="gr224" draw:text-style-name="P32" draw:layer="layout" svg:width="17.148cm" svg:height="2.703cm" svg:x="9.18cm" svg:y="2.818cm">
          <text:p text:style-name="P9"><text:span text:style-name="T57">إلى كم تنقسم علامات الإعراب؟</text:span></text:p>
          <text:p text:style-name="P9"><text:span text:style-name="T58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25" draw:text-style-name="P32" draw:layer="layout" svg:width="15.97cm" svg:height="1.878cm" svg:x="17.246cm" svg:y="11.574cm">
          <text:p text:style-name="P9"><text:span text:style-name="T44">C. </text:span><text:span text:style-name="T50">ثلاثة أقس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26" draw:text-style-name="P32" draw:layer="layout" svg:width="15.97cm" svg:height="1.878cm" svg:x="17.755cm" svg:y="7.6cm">
          <text:p text:style-name="P9"><text:span text:style-name="T44">B. </text:span><text:span text:style-name="T50">قسما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27" draw:text-style-name="P32" draw:layer="layout" svg:width="15.97cm" svg:height="1.878cm" svg:x="0.963cm" svg:y="7.617cm">
          <text:p text:style-name="P9"><text:span text:style-name="T59">A. </text:span><text:span text:style-name="T60">. </text:span><text:span text:style-name="T60">قسم واحد</text:span></text:p>
          <text:p text:style-name="P9"><text:span text:style-name="T61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28" draw:text-style-name="P32" draw:layer="layout" svg:width="15.97cm" svg:height="1.878cm" svg:x="0.963cm" svg:y="11.591cm">
          <text:p text:style-name="P9"><text:span text:style-name="T44">D. </text:span><text:span text:style-name="T50">أربعة أقسا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29" draw:text-style-name="P22" draw:layer="layout" svg:width="2.957cm" svg:height="2.87cm" svg:x="29.297cm" svg:y="16.179cm">
          <office:event-listeners>
            <presentation:event-listener script:event-name="dom:click" presentation:action="show" xlink:href="#page26" xlink:type="simple" xlink:show="embed" xlink:actuate="onRequest"/>
          </office:event-listeners>
          <text:p text:style-name="P9"><text:span text:style-name="T62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lank">
        <draw:custom-shape draw:name="Rectangle: Rounded Corners 4" draw:style-name="gr230" draw:text-style-name="P32" draw:layer="layout" svg:width="17.148cm" svg:height="2.703cm" svg:x="9.18cm" svg:y="2.818cm">
          <text:p text:style-name="P9"><text:span text:style-name="T57">ما علامات الإعراب بالحركات؟</text:span></text:p>
          <text:p text:style-name="P9"><text:span text:style-name="T58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31" draw:text-style-name="P32" draw:layer="layout" svg:width="15.97cm" svg:height="1.878cm" svg:x="18.344cm" svg:y="11.556cm">
          <text:p text:style-name="P9"><text:span text:style-name="T44">D. </text:span><text:span text:style-name="T50">الألف، والواو، والفتحة، والكسر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32" draw:text-style-name="P32" draw:layer="layout" svg:width="15.97cm" svg:height="1.878cm" svg:x="17.755cm" svg:y="7.6cm">
          <text:p text:style-name="P9"><text:span text:style-name="T44">. B. </text:span><text:span text:style-name="T50">الضمة، والفتحة، والكسرة، والسكونسما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33" draw:text-style-name="P32" draw:layer="layout" svg:width="15.97cm" svg:height="1.878cm" svg:x="0.963cm" svg:y="7.617cm">
          <text:p text:style-name="P9"><text:span text:style-name="T57">. </text:span><text:span text:style-name="T57">الواو، والألف، والياء، والنو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34" draw:text-style-name="P32" draw:layer="layout" svg:width="15.97cm" svg:height="1.878cm" svg:x="0.963cm" svg:y="11.591cm">
          <text:p text:style-name="P9"><text:span text:style-name="T44">C. </text:span><text:span text:style-name="T50">الرفع، والنصب، والجر، والجز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35" draw:text-style-name="P22" draw:layer="layout" svg:width="2.783cm" svg:height="2.469cm" svg:x="29.784cm" svg:y="16.284cm">
          <office:event-listeners>
            <presentation:event-listener script:event-name="dom:click" presentation:action="show" xlink:href="#page27" xlink:type="simple" xlink:show="embed" xlink:actuate="onRequest"/>
          </office:event-listeners>
          <text:p text:style-name="P9"><text:span text:style-name="T62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lank">
        <draw:custom-shape draw:name="Rectangle: Rounded Corners 4" draw:style-name="gr236" draw:text-style-name="P32" draw:layer="layout" svg:width="17.148cm" svg:height="2.703cm" svg:x="9.18cm" svg:y="2.818cm">
          <text:p text:style-name="P9"><text:span text:style-name="T49">ما علامات الإعراب بالحروف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37" draw:text-style-name="P32" draw:layer="layout" svg:width="15.97cm" svg:height="1.878cm" svg:x="18.344cm" svg:y="11.556cm">
          <text:p text:style-name="P9"><text:span text:style-name="T44">C. </text:span><text:span text:style-name="T50">الواو، والألف، والياء، والنو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38" draw:text-style-name="P32" draw:layer="layout" svg:width="15.97cm" svg:height="1.878cm" svg:x="17.755cm" svg:y="7.6cm">
          <text:p text:style-name="P9"><text:span text:style-name="T44">B. </text:span><text:span text:style-name="T50">الرفع، والنصب، والجر، والجز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39" draw:text-style-name="P32" draw:layer="layout" svg:width="15.97cm" svg:height="1.878cm" svg:x="0.963cm" svg:y="7.617cm">
          <text:p text:style-name="P9"><text:span text:style-name="T44">A. </text:span><text:span text:style-name="T50">الضمة، والفتحة، والكسرة، والسكو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40" draw:text-style-name="P32" draw:layer="layout" svg:width="15.97cm" svg:height="1.878cm" svg:x="0.963cm" svg:y="11.591cm">
          <text:p text:style-name="P9"><text:span text:style-name="T44">D. </text:span><text:span text:style-name="T50">الفتحة، والواو، والألف، والسكو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41" draw:text-style-name="P22" draw:layer="layout" svg:width="2.991cm" svg:height="2.417cm" svg:x="30.202cm" svg:y="16.284cm">
          <office:event-listeners>
            <presentation:event-listener script:event-name="dom:click" presentation:action="show" xlink:href="#page28" xlink:type="simple" xlink:show="embed" xlink:actuate="onRequest"/>
          </office:event-listeners>
          <text:p text:style-name="P9"><text:span text:style-name="T63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Rectangle: Rounded Corners 4" draw:style-name="gr242" draw:text-style-name="P32" draw:layer="layout" svg:width="17.148cm" svg:height="2.703cm" svg:x="9.18cm" svg:y="2.818cm">
          <text:p text:style-name="P9"><text:span text:style-name="T49">ما علامة رفع كلمة </text:span><text:span text:style-name="T56">المسلمونَ</text:span><text:span text:style-name="T49"> في الجملة الآتية؟</text:span></text:p>
          <text:p text:style-name="P9"><text:span text:style-name="T49">جاءَ المسلمون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43" draw:text-style-name="P32" draw:layer="layout" svg:width="15.97cm" svg:height="1.878cm" svg:x="18.344cm" svg:y="11.556cm">
          <text:p text:style-name="P9"><text:span text:style-name="T44">D. </text:span><text:span text:style-name="T50">النو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44" draw:text-style-name="P32" draw:layer="layout" svg:width="15.97cm" svg:height="1.878cm" svg:x="17.755cm" svg:y="7.6cm">
          <text:p text:style-name="P9"><text:span text:style-name="T44">B. </text:span><text:span text:style-name="T50">ال</text:span><text:span text:style-name="T50">B. </text:span><text:span text:style-name="T50">الألففع، والنصب، والجر، والجزم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45" draw:text-style-name="P32" draw:layer="layout" svg:width="15.97cm" svg:height="1.878cm" svg:x="0.963cm" svg:y="7.617cm">
          <text:p text:style-name="P9"><text:span text:style-name="T44">A. </text:span><text:span text:style-name="T50">الضم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46" draw:text-style-name="P32" draw:layer="layout" svg:width="15.97cm" svg:height="1.878cm" svg:x="0.963cm" svg:y="11.591cm">
          <text:p text:style-name="P9"><text:span text:style-name="T44">C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444cm" svg:height="2.191cm" svg:x="29.471cm" svg:y="16.388cm">
          <office:event-listeners>
            <presentation:event-listener script:event-name="dom:click" presentation:action="show" xlink:href="#page39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lank">
        <draw:custom-shape draw:name="Rectangle: Rounded Corners 4" draw:style-name="gr247" draw:text-style-name="P32" draw:layer="layout" svg:width="17.148cm" svg:height="2.703cm" svg:x="9.18cm" svg:y="2.818cm">
          <text:p text:style-name="P9"><text:span text:style-name="T49">ما علامة رفع الاسم المفرد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48" draw:text-style-name="P32" draw:layer="layout" svg:width="15.97cm" svg:height="1.878cm" svg:x="18.344cm" svg:y="11.556cm">
          <text:p text:style-name="P9"><text:span text:style-name="T44">D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49" draw:text-style-name="P32" draw:layer="layout" svg:width="15.97cm" svg:height="1.878cm" svg:x="17.755cm" svg:y="7.6cm">
          <text:p text:style-name="P9"><text:span text:style-name="T44">B. </text:span><text:span text:style-name="T50">الفتح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50" draw:text-style-name="P32" draw:layer="layout" svg:width="15.97cm" svg:height="1.878cm" svg:x="0.963cm" svg:y="7.617cm">
          <text:p text:style-name="P9"><text:span text:style-name="T44">A. </text:span><text:span text:style-name="T50">الضم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51" draw:text-style-name="P32" draw:layer="layout" svg:width="15.97cm" svg:height="1.878cm" svg:x="0.963cm" svg:y="11.591cm">
          <text:p text:style-name="P9"><text:span text:style-name="T44">C. </text:span><text:span text:style-name="T50">الكسر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252" draw:text-style-name="P22" draw:layer="layout" svg:width="3.165cm" svg:height="2.191cm" svg:x="30.097cm" svg:y="16.214cm">
          <office:event-listeners>
            <presentation:event-listener script:event-name="dom:click" presentation:action="show" xlink:href="#page30" xlink:type="simple" xlink:show="embed" xlink:actuate="onRequest"/>
          </office:event-listeners>
          <text:p text:style-name="P9"><text:span text:style-name="T63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>
        <draw:custom-shape draw:name="Rectangle: Rounded Corners 4" draw:style-name="gr253" draw:text-style-name="P32" draw:layer="layout" svg:width="17.148cm" svg:height="2.703cm" svg:x="9.18cm" svg:y="2.818cm">
          <text:p text:style-name="P9"><text:span text:style-name="T49">أيُّ الجمل الآتية صحيحة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54" draw:text-style-name="P32" draw:layer="layout" svg:width="15.97cm" svg:height="1.878cm" svg:x="18.344cm" svg:y="11.556cm">
          <text:p text:style-name="P9"><text:span text:style-name="T49">جاءَ الطالبْ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55" draw:text-style-name="P32" draw:layer="layout" svg:width="15.97cm" svg:height="1.878cm" svg:x="17.755cm" svg:y="7.6cm">
          <text:p text:style-name="P9"><text:span text:style-name="T44">B. </text:span><text:span text:style-name="T50">جاءَ الطالبُ</text:span><text:span text:style-name="T53"><text:line-break/></text:span><text:span text:style-name="T5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56" draw:text-style-name="P32" draw:layer="layout" svg:width="15.97cm" svg:height="1.878cm" svg:x="0.963cm" svg:y="7.617cm">
          <text:p text:style-name="P9"><text:span text:style-name="T44">A. </text:span><text:span text:style-name="T50">جاءَ الطالب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57" draw:text-style-name="P32" draw:layer="layout" svg:width="15.97cm" svg:height="1.878cm" svg:x="0.963cm" svg:y="11.591cm">
          <text:p text:style-name="P9"><text:span text:style-name="T44">C. </text:span><text:span text:style-name="T50">جاءَ الطالب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" draw:style-name="gr258" draw:text-style-name="P22" draw:layer="layout" svg:width="2.887cm" svg:height="2.661cm" svg:x="30.271cm" svg:y="16.388cm">
          <office:event-listeners>
            <presentation:event-listener script:event-name="dom:click" presentation:action="show" xlink:href="#page31" xlink:type="simple" xlink:show="embed" xlink:actuate="onRequest"/>
          </office:event-listeners>
          <text:p text:style-name="P9"><text:span text:style-name="T62">التالي</text:span></text:p>
          <text:p text:style-name="P9"><text:span text:style-name="T4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>
        <draw:custom-shape draw:name="Rectangle: Rounded Corners 4" draw:style-name="gr259" draw:text-style-name="P32" draw:layer="layout" svg:width="17.148cm" svg:height="2.703cm" svg:x="9.18cm" svg:y="2.818cm">
          <text:p text:style-name="P9"><text:span text:style-name="T49">ما علامة نصب جمع التكسير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60" draw:text-style-name="P32" draw:layer="layout" svg:width="15.97cm" svg:height="1.878cm" svg:x="18.344cm" svg:y="11.556cm">
          <text:p text:style-name="P9"><text:span text:style-name="T44">D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61" draw:text-style-name="P32" draw:layer="layout" svg:width="15.97cm" svg:height="1.878cm" svg:x="17.755cm" svg:y="7.6cm">
          <text:p text:style-name="P9"><text:span text:style-name="T44">B. </text:span><text:span text:style-name="T50">الفتح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62" draw:text-style-name="P32" draw:layer="layout" svg:width="15.97cm" svg:height="1.878cm" svg:x="0.963cm" svg:y="7.617cm">
          <text:p text:style-name="P9"><text:span text:style-name="T44">A. </text:span><text:span text:style-name="T50">الضم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63" draw:text-style-name="P32" draw:layer="layout" svg:width="15.97cm" svg:height="1.878cm" svg:x="0.963cm" svg:y="11.591cm">
          <text:p text:style-name="P9"><text:span text:style-name="T44">C. </text:span><text:span text:style-name="T50">الكسرة</text:span><text:span text:style-name="T53"><text:line-break/></text:span><text:span text:style-name="T5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722cm" svg:height="3.044cm" svg:x="28.949cm" svg:y="16.005cm">
          <office:event-listeners>
            <presentation:event-listener script:event-name="dom:click" presentation:action="show" xlink:href="#page32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>
        <draw:custom-shape draw:name="Rectangle: Rounded Corners 4" draw:style-name="gr264" draw:text-style-name="P32" draw:layer="layout" svg:width="17.148cm" svg:height="2.703cm" svg:x="9.18cm" svg:y="2.818cm">
          <text:p text:style-name="P9"><text:span text:style-name="T49">أيُّ الجمل الآتية صحيحة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65" draw:text-style-name="P32" draw:layer="layout" svg:width="15.97cm" svg:height="1.878cm" svg:x="18.344cm" svg:y="11.556cm">
          <text:p text:style-name="P9"><text:span text:style-name="T44">D. </text:span><text:span text:style-name="T50">رأيتُ الطلابْ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66" draw:text-style-name="P32" draw:layer="layout" svg:width="15.97cm" svg:height="1.878cm" svg:x="17.755cm" svg:y="7.6cm">
          <text:p text:style-name="P9"><text:span text:style-name="T44">B. </text:span><text:span text:style-name="T50">رأيتُ الطلاب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67" draw:text-style-name="P32" draw:layer="layout" svg:width="15.97cm" svg:height="1.878cm" svg:x="0.963cm" svg:y="7.617cm">
          <text:p text:style-name="P9"><text:span text:style-name="T44">A. </text:span><text:span text:style-name="T50">رأيتُ الطلابُ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68" draw:text-style-name="P32" draw:layer="layout" svg:width="15.97cm" svg:height="1.878cm" svg:x="0.963cm" svg:y="11.591cm">
          <text:p text:style-name="P9"><text:span text:style-name="T44">C. </text:span><text:span text:style-name="T50">رأيتُ الطلابَ</text:span><text:span text:style-name="T53"><text:line-break/></text:span><text:span text:style-name="T5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931cm" svg:height="3.131cm" svg:x="29.541cm" svg:y="16.249cm">
          <office:event-listeners>
            <presentation:event-listener script:event-name="dom:click" presentation:action="show" xlink:href="#page39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>
        <draw:custom-shape draw:name="Rectangle: Rounded Corners 4" draw:style-name="gr269" draw:text-style-name="P32" draw:layer="layout" svg:width="17.148cm" svg:height="2.703cm" svg:x="9.18cm" svg:y="2.818cm">
          <text:p text:style-name="P9"><text:span text:style-name="T49">ما علامة نصب جمع المؤنث السالم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70" draw:text-style-name="P32" draw:layer="layout" svg:width="15.97cm" svg:height="1.878cm" svg:x="18.344cm" svg:y="11.556cm">
          <text:p text:style-name="P9"><text:span text:style-name="T44">D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71" draw:text-style-name="P32" draw:layer="layout" svg:width="15.97cm" svg:height="1.878cm" svg:x="17.755cm" svg:y="7.6cm">
          <text:p text:style-name="P9"><text:span text:style-name="T44">B. </text:span><text:span text:style-name="T50">الكسر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72" draw:text-style-name="P32" draw:layer="layout" svg:width="15.97cm" svg:height="1.878cm" svg:x="0.963cm" svg:y="7.617cm">
          <text:p text:style-name="P9"><text:span text:style-name="T44">A. </text:span><text:span text:style-name="T50">الفتح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73" draw:text-style-name="P32" draw:layer="layout" svg:width="15.97cm" svg:height="1.878cm" svg:x="0.963cm" svg:y="11.591cm">
          <text:p text:style-name="P9"><text:span text:style-name="T44">C. </text:span><text:span text:style-name="T50">الضم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27cm" svg:height="2.887cm" svg:x="29.436cm" svg:y="15.692cm">
          <office:event-listeners>
            <presentation:event-listener script:event-name="dom:click" presentation:action="show" xlink:href="#page34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>
        <draw:custom-shape draw:name="Rectangle: Rounded Corners 4" draw:style-name="gr274" draw:text-style-name="P32" draw:layer="layout" svg:width="17.148cm" svg:height="2.703cm" svg:x="9.18cm" svg:y="2.818cm">
          <text:p text:style-name="P9"><text:span text:style-name="T49">أيُّ الجمل الآتية صحيحة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75" draw:text-style-name="P32" draw:layer="layout" svg:width="15.97cm" svg:height="1.878cm" svg:x="18.344cm" svg:y="11.556cm">
          <text:p text:style-name="P9"><text:span text:style-name="T44">D. </text:span><text:span text:style-name="T50">رأيتُ المسلماتْ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76" draw:text-style-name="P32" draw:layer="layout" svg:width="15.97cm" svg:height="1.878cm" svg:x="17.755cm" svg:y="7.6cm">
          <text:p text:style-name="P9"><text:span text:style-name="T44">B. </text:span><text:span text:style-name="T50">رأيتُ المسلماتُ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77" draw:text-style-name="P32" draw:layer="layout" svg:width="15.97cm" svg:height="1.878cm" svg:x="0.963cm" svg:y="7.617cm">
          <text:p text:style-name="P9"><text:span text:style-name="T44">A. </text:span><text:span text:style-name="T50">رأيتُ المسلمات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78" draw:text-style-name="P32" draw:layer="layout" svg:width="15.97cm" svg:height="1.878cm" svg:x="0.963cm" svg:y="11.591cm">
          <text:p text:style-name="P9"><text:span text:style-name="T44">C. </text:span><text:span text:style-name="T50">رأيتُ المسلمات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304cm" svg:height="2.504cm" svg:x="29.923cm" svg:y="16.11cm">
          <office:event-listeners>
            <presentation:event-listener script:event-name="dom:click" presentation:action="show" xlink:href="#page35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>
        <draw:custom-shape draw:name="Rectangle: Rounded Corners 4" draw:style-name="gr279" draw:text-style-name="P32" draw:layer="layout" svg:width="17.148cm" svg:height="2.703cm" svg:x="9.18cm" svg:y="2.818cm">
          <text:p text:style-name="P9"><text:span text:style-name="T49">ما علامة جر الاسم غير المنصرف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80" draw:text-style-name="P32" draw:layer="layout" svg:width="15.97cm" svg:height="1.878cm" svg:x="18.344cm" svg:y="11.556cm">
          <text:p text:style-name="P9"><text:span text:style-name="T44">D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81" draw:text-style-name="P32" draw:layer="layout" svg:width="15.97cm" svg:height="1.878cm" svg:x="17.755cm" svg:y="7.6cm">
          <text:p text:style-name="P9"><text:span text:style-name="T44">B. </text:span><text:span text:style-name="T50">الفتح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82" draw:text-style-name="P32" draw:layer="layout" svg:width="15.97cm" svg:height="1.878cm" svg:x="0.963cm" svg:y="7.617cm">
          <text:p text:style-name="P9"><text:span text:style-name="T44">A. </text:span><text:span text:style-name="T50">الكسر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83" draw:text-style-name="P32" draw:layer="layout" svg:width="15.97cm" svg:height="1.878cm" svg:x="0.963cm" svg:y="11.591cm">
          <text:p text:style-name="P9"><text:span text:style-name="T44">C. </text:span><text:span text:style-name="T50">الضم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" draw:style-name="gr19" draw:text-style-name="P15" draw:layer="layout" svg:width="3.339cm" svg:height="3.026cm" svg:x="29.575cm" svg:y="15.692cm">
          <office:event-listeners>
            <presentation:event-listener script:event-name="dom:click" presentation:action="show" xlink:href="#page39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>
        <draw:custom-shape draw:name="Rectangle: Rounded Corners 4" draw:style-name="gr284" draw:text-style-name="P32" draw:layer="layout" svg:width="17.148cm" svg:height="2.703cm" svg:x="9.18cm" svg:y="3.314cm">
          <text:p text:style-name="P9"><text:span text:style-name="T49">ما علامة رفع الأسماء الخمسة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85" draw:text-style-name="P32" draw:layer="layout" svg:width="15.97cm" svg:height="1.878cm" svg:x="18.344cm" svg:y="11.556cm">
          <text:p text:style-name="P9"><text:span text:style-name="T44">D. </text:span><text:span text:style-name="T50">النون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86" draw:text-style-name="P32" draw:layer="layout" svg:width="15.97cm" svg:height="1.878cm" svg:x="17.755cm" svg:y="7.6cm">
          <text:p text:style-name="P9"><text:span text:style-name="T44">B. </text:span><text:span text:style-name="T50">الياء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87" draw:text-style-name="P32" draw:layer="layout" svg:width="15.97cm" svg:height="1.878cm" svg:x="0.963cm" svg:y="7.617cm">
          <text:p text:style-name="P9"><text:span text:style-name="T44">A. </text:span><text:span text:style-name="T50">الألف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88" draw:text-style-name="P32" draw:layer="layout" svg:width="15.97cm" svg:height="1.878cm" svg:x="0.963cm" svg:y="11.591cm">
          <text:p text:style-name="P9"><text:span text:style-name="T44">C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3.548cm" svg:height="2.957cm" svg:x="29.749cm" svg:y="15.832cm">
          <office:event-listeners>
            <presentation:event-listener script:event-name="dom:click" presentation:action="show" xlink:href="#page37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>
        <draw:custom-shape draw:name="Rectangle: Rounded Corners 4" draw:style-name="gr289" draw:text-style-name="P32" draw:layer="layout" svg:width="17.148cm" svg:height="2.703cm" svg:x="9.18cm" svg:y="3.314cm">
          <text:p text:style-name="P9"><text:span text:style-name="T49">أيُّ الجمل الآتية صحيحة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90" draw:text-style-name="P32" draw:layer="layout" svg:width="15.97cm" svg:height="1.878cm" svg:x="18.344cm" svg:y="11.556cm">
          <text:p text:style-name="P9"><text:span text:style-name="T44">D. </text:span><text:span text:style-name="T50">جاءَ أبُك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91" draw:text-style-name="P32" draw:layer="layout" svg:width="15.97cm" svg:height="1.878cm" svg:x="17.755cm" svg:y="7.6cm">
          <text:p text:style-name="P9"><text:span text:style-name="T44">B. </text:span><text:span text:style-name="T50">جاءَ أباك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92" draw:text-style-name="P32" draw:layer="layout" svg:width="15.97cm" svg:height="1.878cm" svg:x="0.963cm" svg:y="7.617cm">
          <text:p text:style-name="P9"><text:span text:style-name="T44">A. </text:span><text:span text:style-name="T50">جاءَ أبوك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93" draw:text-style-name="P32" draw:layer="layout" svg:width="15.97cm" svg:height="1.878cm" svg:x="0.963cm" svg:y="11.591cm">
          <text:p text:style-name="P9"><text:span text:style-name="T44">C. </text:span><text:span text:style-name="T50">جاءَ أبيكَ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" draw:style-name="gr19" draw:text-style-name="P15" draw:layer="layout" svg:width="3.2cm" svg:height="2.191cm" svg:x="29.888cm" svg:y="16.249cm">
          <office:event-listeners>
            <presentation:event-listener script:event-name="dom:click" presentation:action="show" xlink:href="#page38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>
        <draw:custom-shape draw:name="Rectangle: Rounded Corners 4" draw:style-name="gr294" draw:text-style-name="P32" draw:layer="layout" svg:width="17.148cm" svg:height="2.703cm" svg:x="9.18cm" svg:y="3.314cm">
          <text:p text:style-name="P9"><text:span text:style-name="T49">ما علامة رفع المثنى؟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295" draw:text-style-name="P32" draw:layer="layout" svg:width="15.97cm" svg:height="1.878cm" svg:x="18.344cm" svg:y="11.556cm">
          <text:p text:style-name="P9"><text:span text:style-name="T44">D. </text:span><text:span text:style-name="T50">الياء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296" draw:text-style-name="P32" draw:layer="layout" svg:width="15.97cm" svg:height="1.878cm" svg:x="17.755cm" svg:y="7.6cm">
          <text:p text:style-name="P9"><text:span text:style-name="T44">B. </text:span><text:span text:style-name="T50">الألف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297" draw:text-style-name="P32" draw:layer="layout" svg:width="15.97cm" svg:height="1.878cm" svg:x="0.963cm" svg:y="7.617cm">
          <text:p text:style-name="P9"><text:span text:style-name="T44">A. </text:span><text:span text:style-name="T50">الضمة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298" draw:text-style-name="P32" draw:layer="layout" svg:width="15.97cm" svg:height="1.878cm" svg:x="0.963cm" svg:y="11.591cm">
          <text:p text:style-name="P9"><text:span text:style-name="T44">C. </text:span><text:span text:style-name="T50">الواو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" draw:style-name="gr19" draw:text-style-name="P15" draw:layer="layout" svg:width="2.4cm" svg:height="1.878cm" svg:x="30.863cm" svg:y="16.632cm">
          <office:event-listeners>
            <presentation:event-listener script:event-name="dom:click" presentation:action="show" xlink:href="#page39" xlink:type="simple" xlink:show="embed" xlink:actuate="onRequest"/>
          </office:event-listeners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>
        <draw:custom-shape draw:name="Oval 3" draw:style-name="gr299" draw:text-style-name="P22" draw:layer="layout" svg:width="4.042cm" svg:height="2.703cm" svg:x="29.255cm" svg:y="15.433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9"><text:span text:style-name="T64">رجوع</text:span></text:p>
          <text:p text:style-name="P9"><text:span text:style-name="T48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4" draw:style-name="gr300" draw:text-style-name="P32" draw:layer="layout" svg:width="17.148cm" svg:height="2.703cm" svg:x="9.242cm" svg:y="0.836cm">
          <text:p text:style-name="P9"><text:span text:style-name="T49">الدُّرُوسُ المُقَرَّرَةُ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6" draw:style-name="gr301" draw:text-style-name="P32" draw:layer="layout" svg:width="15.97cm" svg:height="1.878cm" svg:x="17.755cm" svg:y="9.026cm">
          <office:event-listeners>
            <presentation:event-listener script:event-name="dom:click" presentation:action="show" xlink:href="#page21" xlink:type="simple" xlink:show="embed" xlink:actuate="onRequest"/>
          </office:event-listeners>
          <text:p text:style-name="P9"><text:span text:style-name="T56">الدَّرْسُ الثَّانِي</text:span><text:span text:style-name="T49"> — تَعْرِيفُ الإِعْرَابِ وَأَقْسَامُهُ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7" draw:style-name="gr302" draw:text-style-name="P32" draw:layer="layout" svg:width="15.97cm" svg:height="1.878cm" svg:x="17.755cm" svg:y="5.187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9"><text:span text:style-name="T56">الدَّرْسُ الأَوَّلُ</text:span><text:span text:style-name="T49"> — تَعْرِيفُ الْكَلَام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8" draw:style-name="gr303" draw:text-style-name="P32" draw:layer="layout" svg:width="15.97cm" svg:height="1.878cm" svg:x="0cm" svg:y="5.187cm">
          <office:event-listeners>
            <presentation:event-listener script:event-name="dom:click" presentation:action="show" xlink:href="#page29" xlink:type="simple" xlink:show="embed" xlink:actuate="onRequest"/>
          </office:event-listeners>
          <text:p text:style-name="P9"><text:span text:style-name="T56">الدَّرْسُ الرَّابِعُ</text:span><text:span text:style-name="T49"> — إِعْرَابُ الْمُفْرَدِ وَجَمْعُ التَّكْسِير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9" draw:style-name="gr304" draw:text-style-name="P32" draw:layer="layout" svg:width="15.97cm" svg:height="1.878cm" svg:x="0.141cm" svg:y="8.998cm">
          <office:event-listeners>
            <presentation:event-listener script:event-name="dom:click" presentation:action="show" xlink:href="#page33" xlink:type="simple" xlink:show="embed" xlink:actuate="onRequest"/>
          </office:event-listeners>
          <text:p text:style-name="P9"><text:span text:style-name="T56">الدَّرْسُ الْخَامِسُ</text:span><text:span text:style-name="T49"> — جَمْعُ الْمُؤَنَّثِ السَّالِمِ وَالِاسْمُ غَيْرُ الْمُنْصَرِف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0" draw:style-name="gr305" draw:text-style-name="P32" draw:layer="layout" svg:width="15.97cm" svg:height="1.878cm" svg:x="0.246cm" svg:y="12.911cm">
          <office:event-listeners>
            <presentation:event-listener script:event-name="dom:click" presentation:action="show" xlink:href="#page36" xlink:type="simple" xlink:show="embed" xlink:actuate="onRequest"/>
          </office:event-listeners>
          <text:p text:style-name="P9"><text:span text:style-name="T56">الدَّرْسُ السَّادِسُ</text:span><text:span text:style-name="T49"> — الأَسْمَاءُ الْخَمْسَةُ وَالْمُثَنَّى وَجَمْعُ الْمُذَكَّرِ السَّالِم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1" draw:style-name="gr306" draw:text-style-name="P32" draw:layer="layout" svg:width="15.97cm" svg:height="1.878cm" svg:x="17.755cm" svg:y="13.067cm">
          <office:event-listeners>
            <presentation:event-listener script:event-name="dom:click" presentation:action="show" xlink:href="#page25" xlink:type="simple" xlink:show="embed" xlink:actuate="onRequest"/>
          </office:event-listeners>
          <text:p text:style-name="P9"><text:span text:style-name="T56">الدَّرْسُ الثَّالِثُ</text:span><text:span text:style-name="T49"> — عَلَامَاتُ الإِعْرَابِ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>
        <draw:custom-shape draw:name="TextBox 10" draw:style-name="gr307" draw:text-style-name="P10" draw:layer="layout" svg:width="30.665cm" svg:height="16.414cm" svg:x="1.6cm" svg:y="0.62cm">
          <text:p text:style-name="P9"><text:span text:style-name="T65">PETUNJUK PEMBELAJARAN</text:span></text:p>
          <text:p text:style-name="P9"><text:span text:style-name="T65"/></text:p>
          <text:p text:style-name="P6"><text:span text:style-name="T66">Selamat datang di media pembelajaran Nahwu berbasis </text:span><text:span text:style-name="T65">Mind Mapping</text:span><text:span text:style-name="T66">. Ikuti langkah-langkah berikut agar pembelajaran dapat berlangsung secara terarah dan optimal.</text:span></text:p>
          <text:p text:style-name="P6"><text:span text:style-name="T65">1. Pelajari Materi dari Kitab</text:span></text:p>
          <text:p text:style-name="P6"><text:span text:style-name="T66">Pembelajaran tetap menggunakan </text:span><text:span text:style-name="T65">Kitab Jurumiyah dan Mukhtashar Jiddan</text:span><text:span text:style-name="T66"> sebagai sumber dan rujukan utama. Pelajari materi dan simak penjelasan guru dengan baik.</text:span></text:p>
          <text:p text:style-name="P6"><text:span text:style-name="T65">2. Pahami melalui Mind Mapping</text:span></text:p>
          <text:p text:style-name="P6"><text:span text:style-name="T66">Setelah mempelajari materi tertentu, buka bagian </text:span><text:span text:style-name="T65">Mind Mapping</text:span><text:span text:style-name="T66"> yang tersedia. Mind Mapping disajikan untuk membantu menyederhanakan materi, menghubungkan antarkonsep, serta mempermudah pemahaman terhadap kaidah-kaidah Nahwu.</text:span></text:p>
          <text:p text:style-name="P6"><text:span text:style-name="T65">3. Perkuat Hafalan</text:span></text:p>
          <text:p text:style-name="P6"><text:span text:style-name="T66">Pada bagian materi tertentu yang dilengkapi dengan </text:span><text:span text:style-name="T65">lagu hafalan</text:span><text:span text:style-name="T66">, manfaatkan lagu tersebut untuk membantu mengingat dan menguatkan hafalan tanda-tanda i'rab. Dengarkan dan ulangi beberapa kali agar materi lebih mudah melekat dalam ingatan.</text:span></text:p>
          <text:p text:style-name="P6"><text:span text:style-name="T65">4. Uji Kemampuanmu</text:span></text:p>
          <text:p text:style-name="P6"><text:span text:style-name="T66">Setelah mempelajari materi, buka menu </text:span><text:span text:style-name="T65">Evaluasi</text:span><text:span text:style-name="T66">. Pilih materi yang telah dipelajari, kemudian kerjakan soal-soal yang tersedia untuk mengukur tingkat pemahamanmu.</text:span></text:p>
          <text:p text:style-name="P6"><text:span text:style-name="T65">5. Pelajari Kembali Materi</text:span></text:p>
          <text:p text:style-name="P6"><text:span text:style-name="T66">Jika masih terdapat jawaban yang kurang tepat, jangan khawatir. Kembali ke bagian </text:span><text:span text:style-name="T65">Materi</text:span><text:span text:style-name="T66"> atau </text:span><text:span text:style-name="T65">Mind Mapping</text:span><text:span text:style-name="T66">, pelajari kembali materi yang belum dipahami, kemudian ulangi evaluas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08" draw:text-style-name="P34" draw:layer="layout" svg:width="3.276cm" svg:height="1.8cm" svg:x="29.534cm" svg:y="16.3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6"><text:span text:style-name="T67">kembali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>
        <office:forms form:automatic-focus="false" form:apply-design-mode="false"/>
        <draw:custom-shape draw:name="TextBox 10" draw:style-name="gr309" draw:text-style-name="P10" draw:layer="layout" svg:width="29.748cm" svg:height="18.722cm" svg:x="1.322cm" svg:y="0.163cm">
          <text:p text:style-name="P9"><text:span text:style-name="T68">T</text:span><text:span text:style-name="T65">UJUAN PEMBUATAN MEDIA</text:span></text:p>
          <text:p text:style-name="P6"><text:span text:style-name="T66">Media pembelajaran ini dikembangkan sebagai media pendukung pembelajaran Nahwu yang memadukan teknologi dengan penyajian materi berbasis </text:span><text:span text:style-name="T65">Mind Mapping</text:span><text:span text:style-name="T66">. Media ini dirancang untuk membantu peserta didik memahami dan mengingat kaidah-kaidah Nahwu secara lebih mudah, terstruktur, dan menarik.</text:span></text:p>
          <text:p text:style-name="P6"><text:span text:style-name="T66">Secara khusus, media ini bertujuan untuk:</text:span></text:p>
          <text:p text:style-name="P6"><text:span text:style-name="T65">1. Mempermudah Pemahaman Materi Nahwu</text:span></text:p>
          <text:p text:style-name="P6"><text:span text:style-name="T66">Menyajikan materi Nahwu secara lebih ringkas dan visual melalui Mind Mapping sehingga hubungan antara konsep dan kaidah dapat dipahami dengan lebih mudah.</text:span></text:p>
          <text:p text:style-name="P6"><text:span text:style-name="T65">2. Membantu Menghafal Tanda-Tanda I'rab</text:span></text:p>
          <text:p text:style-name="P6"><text:span text:style-name="T66">Membantu peserta didik mengingat tanda-tanda i'rab melalui penyajian yang sistematis dan, pada materi tertentu, diperkuat dengan lagu atau media hafalan.</text:span></text:p>
          <text:p text:style-name="P6"><text:span text:style-name="T65">3. Mengintegrasikan Kitab dengan Teknologi</text:span></text:p>
          <text:p text:style-name="P6"><text:span text:style-name="T66">Menjadikan PowerPoint interaktif sebagai media pendukung pembelajaran, sementara </text:span><text:span text:style-name="T65">Kitab Jurumiyah dan Mukhtashar Jiddan tetap menjadi sumber dan rujukan utama</text:span><text:span text:style-name="T66"> dalam memahami materi Nahwu.</text:span></text:p>
          <text:p text:style-name="P6"><text:span text:style-name="T65">4. Meningkatkan Keterlibatan Peserta Didik</text:span></text:p>
          <text:p text:style-name="P6"><text:span text:style-name="T66">Menciptakan pengalaman belajar yang lebih aktif melalui navigasi interaktif, Mind Mapping, serta latihan soal yang dapat dikerjakan secara langsung.</text:span></text:p>
          <text:p text:style-name="P6"><text:span text:style-name="T65">5. Mengukur Pemahaman Peserta Didik</text:span></text:p>
          <text:p text:style-name="P6"><text:span text:style-name="T66">Menyediakan evaluasi pada setiap materi untuk membantu peserta didik mengukur pemahaman terhadap materi yang telah dipelajari.</text:span></text:p>
          <text:p text:style-name="P6"><text:span text:style-name="T65">6. Menciptakan Pembelajaran Nahwu yang Lebih Menarik</text:span></text:p>
          <text:p text:style-name="P6"><text:span text:style-name="T66">Menghadirkan alternatif pembelajaran Nahwu yang lebih visual, interaktif, dan menyenangkan tanpa menghilangkan karakteristik pembelajaran berbasis kitab.</text:span></text:p>
          <text:p text:style-name="P9"><text:span text:style-name="T6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310" draw:text-style-name="P34" draw:layer="layout" svg:width="3.276cm" svg:height="1.8cm" svg:x="29.534cm" svg:y="16.3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6"><text:span text:style-name="T67">kembali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aditional Arabic" svg:font-family="'Traditional Arabi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6f6f6f" draw:end-color="#c9c9c9" draw:start-intensity="100%" draw:end-intensity="100%" draw:angle="180deg" draw:border="0%">
      <loext:gradient-stop svg:offset="0" loext:color-type="rgb" loext:color-value="#6f6f6f"/>
      <loext:gradient-stop svg:offset="0.48" loext:color-type="rgb" loext:color-value="#a8a8a8"/>
      <loext:gradient-stop svg:offset="1" loext:color-type="rgb" loext:color-value="#c9c9c9"/>
    </draw:gradient>
    <draw:gradient draw:name="Gradient_20_2" draw:display-name="Gradient 2" draw:style="linear" draw:start-color="#b0500f" draw:end-color="#f4b183" draw:start-intensity="100%" draw:end-intensity="100%" draw:angle="180deg" draw:border="0%">
      <loext:gradient-stop svg:offset="0" loext:color-type="rgb" loext:color-value="#b0500f"/>
      <loext:gradient-stop svg:offset="0.48" loext:color-type="rgb" loext:color-value="#ee8137"/>
      <loext:gradient-stop svg:offset="1" loext:color-type="rgb" loext:color-value="#f4b183"/>
    </draw:gradient>
    <draw:gradient draw:name="Gradient_20_3" draw:display-name="Gradient 3" draw:style="linear" draw:start-color="#80b761" draw:end-color="#61a235" draw:start-intensity="100%" draw:end-intensity="100%" draw:angle="0deg" draw:border="0%">
      <loext:gradient-stop svg:offset="0" loext:color-type="rgb" loext:color-value="#80b761"/>
      <loext:gradient-stop svg:offset="0.5" loext:color-type="rgb" loext:color-value="#6fb142"/>
      <loext:gradient-stop svg:offset="1" loext:color-type="rgb" loext:color-value="#61a235"/>
    </draw:gradient>
    <draw:gradient draw:name="Gradient_20_4" draw:display-name="Gradient 4" draw:style="linear" draw:start-color="#2a69a2" draw:end-color="#9dc3e6" draw:start-intensity="100%" draw:end-intensity="100%" draw:angle="180deg" draw:border="0%">
      <loext:gradient-stop svg:offset="0" loext:color-type="rgb" loext:color-value="#2a69a2"/>
      <loext:gradient-stop svg:offset="0.48" loext:color-type="rgb" loext:color-value="#609ed6"/>
      <loext:gradient-stop svg:offset="1" loext:color-type="rgb" loext:color-value="#9dc3e6"/>
    </draw:gradient>
    <draw:gradient draw:name="Gradient_20_5" draw:display-name="Gradient 5" draw:style="linear" draw:start-color="#4b7430" draw:end-color="#a9d18e" draw:start-intensity="100%" draw:end-intensity="100%" draw:angle="180deg" draw:border="0%">
      <loext:gradient-stop svg:offset="0" loext:color-type="rgb" loext:color-value="#4b7430"/>
      <loext:gradient-stop svg:offset="0.48" loext:color-type="rgb" loext:color-value="#74b349"/>
      <loext:gradient-stop svg:offset="1" loext:color-type="rgb" loext:color-value="#a9d18e"/>
    </draw:gradient>
    <draw:gradient draw:name="Gradient_20_6" draw:display-name="Gradient 6" draw:style="linear" draw:start-color="#ab8100" draw:end-color="#ffd966" draw:start-intensity="100%" draw:end-intensity="100%" draw:angle="180deg" draw:border="0%">
      <loext:gradient-stop svg:offset="0" loext:color-type="rgb" loext:color-value="#ab8100"/>
      <loext:gradient-stop svg:offset="0.48" loext:color-type="rgb" loext:color-value="#ffc208"/>
      <loext:gradient-stop svg:offset="1" loext:color-type="rgb" loext:color-value="#ffd966"/>
    </draw:gradient>
    <draw:gradient draw:name="Gradient_20_7" draw:display-name="Gradient 7" draw:style="linear" draw:start-color="#2a4b86" draw:end-color="#8faadc" draw:start-intensity="100%" draw:end-intensity="100%" draw:angle="180deg" draw:border="0%">
      <loext:gradient-stop svg:offset="0" loext:color-type="rgb" loext:color-value="#2a4b86"/>
      <loext:gradient-stop svg:offset="0.48" loext:color-type="rgb" loext:color-value="#4a76c6"/>
      <loext:gradient-stop svg:offset="1" loext:color-type="rgb" loext:color-value="#8faa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family="Calibri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6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6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9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4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7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9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language-complex="ar" style:country-complex="SA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35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1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1" draw:text-style-name="MP6" draw:layer="backgroundobjects" svg:width="29.209cm" svg:height="7.923cm" svg:x="2.311cm" svg:y="4.749cm" presentation:class="title" presentation:user-transformed="true">
        <draw:text-box>
          <text:p text:style-name="MP18"><text:span text:style-name="MT1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p text:style-name="MP19"><text:span text:style-name="MT8">Click to edit Master text styles</text:span></text:p>
        </draw:text-box>
      </draw:frame>
      <draw:frame draw:name="Date Placeholder 3" presentation:style-name="Mpr2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7" draw:text-style-name="MP17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7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1" draw:text-style-name="MP14" draw:layer="backgroundobjects" svg:width="29.209cm" svg:height="3.681cm" svg:x="2.333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3" presentation:style-name="Mpr33" draw:text-style-name="MP17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5" presentation:style-name="Mpr33" draw:text-style-name="MP17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3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1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4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Content Placeholder 2" presentation:style-name="Mpr45" draw:text-style-name="MP24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25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46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9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Picture Placeholder 2" presentation:style-name="Mpr50" draw:text-style-name="MP24" draw:layer="backgroundobjects" svg:width="17.144cm" svg:height="13.537cm" svg:x="14.398cm" svg:y="2.743cm" presentation:class="outline" presentation:user-transformed="true">
        <draw:text-box>
          <text:list text:style-name="ML13">
            <text:list-item>
              <text:p text:style-name="MP29">Click to edit the outline text format</text:p>
              <text:list>
                <text:list-item>
                  <text:p text:style-name="MP29">Second Outline Level</text:p>
                  <text:list>
                    <text:list-item>
                      <text:p text:style-name="MP29">Third Outline Level</text:p>
                      <text:list>
                        <text:list-item>
                          <text:p text:style-name="MP29">Fourth Outline Level</text:p>
                          <text:list>
                            <text:list-item>
                              <text:p text:style-name="MP29">Fifth Outline Level</text:p>
                              <text:list>
                                <text:list-item>
                                  <text:p text:style-name="MP29">Sixth Outline Level</text:p>
                                  <text:list>
                                    <text:list-item>
                                      <text:p text:style-name="MP2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5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 Presentation</dc:title>
    <meta:initial-creator>Reza Alfarizi</meta:initial-creator>
    <meta:editing-cycles>57</meta:editing-cycles>
    <meta:creation-date>2026-07-13T09:06:51</meta:creation-date>
    <dc:date>2026-07-24T03:23:17.739207220</dc:date>
    <meta:editing-duration>PT21H6M55S</meta:editing-duration>
    <meta:generator>LibreOffice/26.2.4.2$Linux_X86_64 LibreOffice_project/620$Build-2</meta:generator>
    <meta:document-statistic meta:object-count="686"/>
    <meta:user-defined meta:name="AppVersion">16.0000</meta:user-defined>
    <meta:user-defined meta:name="MMClips" meta:value-type="float">2</meta:user-defined>
    <meta:user-defined meta:name="PresentationFormat">Widescreen</meta:user-defined>
    <meta:user-defined meta:name="Slides" meta:value-type="float">41</meta:user-defined>
  </office:meta>
</office:document-meta>
</file>